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1000001B1EA8010D20DED931E.png" manifest:media-type="image/png"/>
  <manifest:file-entry manifest:full-path="Pictures/100000010000054B000004117FD1D7F585BCD117.png" manifest:media-type="image/png"/>
  <manifest:file-entry manifest:full-path="Pictures/1000000100000431000003AFC40129370882227F.png" manifest:media-type="image/png"/>
  <manifest:file-entry manifest:full-path="Pictures/10000001000003FD000003A94B074B3D762F76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beea1"/>
    </style:style>
    <style:style style:name="P2" style:family="paragraph" style:parent-style-name="Text_20_body">
      <style:text-properties officeooo:paragraph-rsid="000beea1"/>
    </style:style>
    <style:style style:name="P3" style:family="paragraph" style:parent-style-name="Quotations">
      <style:paragraph-properties fo:margin-top="0cm" fo:margin-bottom="0cm" style:contextual-spacing="false"/>
      <style:text-properties officeooo:paragraph-rsid="000c4c1f"/>
    </style:style>
    <style:style style:name="P4" style:family="paragraph" style:parent-style-name="Standard">
      <style:paragraph-properties fo:margin-top="0cm" fo:margin-bottom="0.635cm" style:contextual-spacing="false" fo:line-height="150%" fo:text-align="center" style:justify-single-word="false"/>
      <style:text-properties officeooo:paragraph-rsid="000beea1"/>
    </style:style>
    <style:style style:name="P5" style:family="paragraph" style:parent-style-name="Standard">
      <style:paragraph-properties fo:margin-top="0cm" fo:margin-bottom="0.635cm" style:contextual-spacing="false" fo:line-height="150%" fo:text-align="center" style:justify-single-word="false"/>
      <style:text-properties style:font-name="Arial" fo:font-size="14pt" fo:font-weight="bold" officeooo:paragraph-rsid="000beea1" style:font-name-asian="Arial1" style:font-size-asian="14pt" style:font-weight-asian="bold" style:font-name-complex="Arial1" style:font-size-complex="14pt" style:font-weight-complex="bold"/>
    </style:style>
    <style:style style:name="P6" style:family="paragraph" style:parent-style-name="Standard">
      <style:paragraph-properties fo:margin-top="0cm" fo:margin-bottom="0cm" style:contextual-spacing="false" fo:line-height="150%" fo:text-align="center" style:justify-single-word="false"/>
      <style:text-properties style:font-name="Arial" fo:font-size="14pt" fo:font-weight="bold" officeooo:paragraph-rsid="000beea1" style:font-name-asian="Arial1" style:font-size-asian="14pt" style:font-weight-asian="bold" style:font-name-complex="Arial1" style:font-size-complex="14pt" style:font-weight-complex="bold"/>
    </style:style>
    <style:style style:name="P7" style:family="paragraph" style:parent-style-name="Text_20_body">
      <style:paragraph-properties fo:margin-top="0cm" fo:margin-bottom="0cm" style:contextual-spacing="false"/>
    </style:style>
    <style:style style:name="P8" style:family="paragraph" style:parent-style-name="Text_20_body">
      <style:text-properties fo:font-size="14pt" fo:font-weight="bold" officeooo:paragraph-rsid="000beea1" style:font-size-asian="14pt" style:font-weight-asian="bold" style:font-size-complex="14pt" style:font-weight-complex="bold"/>
    </style:style>
    <style:style style:name="P9" style:family="paragraph" style:parent-style-name="Text_20_body">
      <style:text-properties fo:font-size="14pt" fo:font-weight="bold" officeooo:rsid="000c4c1f" officeooo:paragraph-rsid="000c4c1f" style:font-size-asian="14pt" style:font-size-complex="14pt"/>
    </style:style>
    <style:style style:name="P10" style:family="paragraph" style:parent-style-name="Text_20_body">
      <style:text-properties fo:font-size="14pt" officeooo:paragraph-rsid="000beea1" style:font-size-asian="14pt" style:font-size-complex="14pt"/>
    </style:style>
    <style:style style:name="P11" style:family="paragraph" style:parent-style-name="Heading_20_2">
      <style:text-properties fo:font-size="18pt" fo:font-weight="bold" officeooo:paragraph-rsid="000beea1" style:font-size-asian="18pt" style:font-weight-asian="bold" style:font-size-complex="18pt" style:font-weight-complex="bold"/>
    </style:style>
    <style:style style:name="P12" style:family="paragraph" style:parent-style-name="Text_20_body">
      <style:text-properties fo:font-size="18pt" fo:font-weight="bold" officeooo:paragraph-rsid="000beea1" style:font-size-asian="18pt" style:font-weight-asian="bold" style:font-size-complex="18pt" style:font-weight-complex="bold"/>
    </style:style>
    <style:style style:name="P13" style:family="paragraph" style:parent-style-name="Heading_20_2">
      <style:paragraph-properties>
        <style:tab-stops>
          <style:tab-stop style:position="12.024cm"/>
        </style:tab-stops>
      </style:paragraph-properties>
    </style:style>
    <style:style style:name="P14" style:family="paragraph" style:parent-style-name="Heading_20_2">
      <style:text-properties fo:font-weight="bold" officeooo:rsid="000eb384" officeooo:paragraph-rsid="000beea1" style:font-weight-asian="bold" style:font-weight-complex="bold"/>
    </style:style>
    <style:style style:name="P15" style:family="paragraph" style:parent-style-name="Quotations">
      <style:paragraph-properties fo:margin-top="0cm" fo:margin-bottom="0cm" style:contextual-spacing="false"/>
      <style:text-properties officeooo:paragraph-rsid="0013bfb3"/>
    </style:style>
    <style:style style:name="P16" style:family="paragraph" style:parent-style-name="Text_20_body">
      <style:paragraph-properties fo:margin-top="0cm" fo:margin-bottom="0cm" style:contextual-spacing="false"/>
      <style:text-properties officeooo:paragraph-rsid="0013bfb3"/>
    </style:style>
    <style:style style:name="P17" style:family="paragraph" style:parent-style-name="Text_20_body">
      <style:text-properties officeooo:paragraph-rsid="0013bfb3"/>
    </style:style>
    <style:style style:name="P18" style:family="paragraph" style:parent-style-name="Preformatted_20_Text">
      <style:paragraph-properties fo:margin-top="0cm" fo:margin-bottom="0.499cm" style:contextual-spacing="false"/>
    </style:style>
    <style:style style:name="P19" style:family="paragraph" style:parent-style-name="Standard">
      <style:paragraph-properties fo:margin-top="0cm" fo:margin-bottom="0.499cm" style:contextual-spacing="false"/>
    </style:style>
    <style:style style:name="P20" style:family="paragraph" style:parent-style-name="Standard">
      <style:paragraph-properties fo:margin-top="0cm" fo:margin-bottom="0.635cm" style:contextual-spacing="false" fo:line-height="150%" fo:text-align="center" style:justify-single-word="false"/>
      <style:text-properties style:font-name="Times New Roman" fo:font-size="16pt" fo:font-weight="bold" officeooo:paragraph-rsid="000beea1" style:font-size-asian="16pt" style:font-weight-asian="bold" style:font-name-complex="Times New Roman1" style:font-size-complex="16pt"/>
    </style:style>
    <style:style style:name="P21" style:family="paragraph" style:parent-style-name="Text_20_body">
      <style:paragraph-properties fo:text-align="start" style:justify-single-word="false"/>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fo:font-weight="normal" officeooo:rsid="000eb384" style:font-weight-asian="normal" style:font-weight-complex="normal"/>
    </style:style>
    <style:style style:name="P24" style:family="paragraph" style:parent-style-name="Text_20_body">
      <style:paragraph-properties fo:margin-top="0cm" fo:margin-bottom="0.499cm" style:contextual-spacing="false" fo:line-height="114%"/>
    </style:style>
    <style:style style:name="P25" style:family="paragraph" style:parent-style-name="Standard" style:list-style-name="">
      <style:paragraph-properties fo:margin-top="0.494cm" fo:margin-bottom="0.494cm" style:contextual-spacing="false" fo:line-height="100%"/>
      <style:text-properties style:font-name="Times New Roman" fo:font-size="18pt" fo:font-weight="bold" officeooo:paragraph-rsid="000beea1" style:font-name-asian="Times New Roman1" style:font-size-asian="18pt" style:language-asian="tr" style:country-asian="TR" style:font-weight-asian="bold" style:font-name-complex="Times New Roman1" style:font-size-complex="18pt" style:font-weight-complex="bold"/>
    </style:style>
    <style:style style:name="P26" style:family="paragraph" style:parent-style-name="Standard" style:list-style-name="">
      <style:paragraph-properties fo:margin-top="0.494cm" fo:margin-bottom="0.494cm" style:contextual-spacing="false" fo:line-height="100%"/>
      <style:text-properties officeooo:paragraph-rsid="000beea1"/>
    </style:style>
    <style:style style:name="P27" style:family="paragraph" style:parent-style-name="Heading_20_3">
      <style:text-properties officeooo:paragraph-rsid="0013bfb3"/>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text-properties officeooo:paragraph-rsid="0013bfb3"/>
    </style:style>
    <style:style style:name="P34" style:family="paragraph" style:parent-style-name="Text_20_body"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fo:font-size="12pt" fo:font-weight="bold" style:font-name-asian="Arial1" style:font-size-asian="12pt" style:font-weight-asian="bold" style:font-name-complex="Arial1" style:font-size-complex="12pt" style:font-weight-complex="bold"/>
    </style:style>
    <style:style style:name="T4" style:family="text">
      <style:text-properties style:font-name="Arial" fo:font-size="12pt" fo:font-weight="bold" officeooo:rsid="000beea1" style:font-name-asian="Arial1" style:font-size-asian="12pt" style:font-weight-asian="bold" style:font-name-complex="Arial1" style:font-size-complex="12pt" style:font-weight-complex="bold"/>
    </style:style>
    <style:style style:name="T5" style:family="text">
      <style:text-properties style:font-name="Times New Roman" fo:font-size="16pt" fo:font-weight="bold" style:font-size-asian="16pt" style:font-weight-asian="bold" style:font-name-complex="Times New Roman1" style:font-size-complex="16pt"/>
    </style:style>
    <style:style style:name="T6" style:family="text">
      <style:text-properties style:font-name="Times New Roman" fo:font-size="16pt" fo:font-weight="bold" officeooo:rsid="0013bfb3" style:font-size-asian="16pt" style:font-weight-asian="bold" style:font-name-complex="Times New Roman1" style:font-size-complex="16pt"/>
    </style:style>
    <style:style style:name="T7" style:family="text">
      <style:text-properties style:font-name="Times New Roman" fo:font-size="16pt" fo:font-weight="bold" style:letter-kerning="true" style:font-name-asian="Times New Roman1" style:font-size-asian="16pt" style:language-asian="tr" style:country-asian="TR" style:font-weight-asian="bold" style:font-name-complex="Times New Roman1" style:font-size-complex="16pt" style:font-weight-complex="bold"/>
    </style:style>
    <style:style style:name="T8" style:family="text">
      <style:text-properties style:font-name="Times New Roman" fo:font-size="14pt" fo:font-weight="bold" style:font-name-asian="Times New Roman1" style:font-size-asian="14pt" style:language-asian="tr" style:country-asian="TR" style:font-weight-asian="bold" style:font-name-complex="Times New Roman1" style:font-size-complex="14pt" style:font-weight-complex="bold"/>
    </style:style>
    <style:style style:name="T9" style:family="text">
      <style:text-properties style:font-name="Times New Roman" fo:font-size="14pt" fo:font-weight="normal" style:font-name-asian="Times New Roman1" style:font-size-asian="14pt" style:language-asian="tr" style:country-asian="TR" style:font-weight-asian="normal" style:font-name-complex="Times New Roman1" style:font-size-complex="14pt" style:font-weight-complex="normal"/>
    </style:style>
    <style:style style:name="T10" style:family="text">
      <style:text-properties fo:color="#0070c0" loext:opacity="100%" style:font-name="Times New Roman" fo:font-size="16pt" fo:font-weight="bold" style:font-name-asian="Arial1" style:font-size-asian="16pt" style:font-weight-asian="bold" style:font-name-complex="Times New Roman1" style:font-size-complex="16pt" style:font-weight-complex="bold"/>
    </style:style>
    <style:style style:name="T11" style:family="text">
      <style:text-properties fo:color="#ff0000" loext:opacity="100%" style:font-name="Times New Roman" fo:font-size="16pt" fo:font-weight="bold" style:font-name-asian="Arial1" style:font-size-asian="16pt" style:font-weight-asian="bold" style:font-name-complex="Times New Roman1" style:font-size-complex="16pt" style:font-weight-complex="bold"/>
    </style:style>
    <style:style style:name="T12" style:family="text">
      <style:text-properties fo:font-weight="normal" style:font-weight-asian="normal" style:font-weight-complex="normal"/>
    </style:style>
    <style:style style:name="T13" style:family="text">
      <style:text-properties officeooo:rsid="000c4c1f"/>
    </style:style>
    <style:style style:name="T14" style:family="text">
      <style:text-properties fo:font-size="12pt" fo:font-weight="bold" style:font-size-asian="12pt" style:font-weight-asian="bold" style:font-size-complex="12pt" style:font-weight-complex="bold"/>
    </style:style>
    <style:style style:name="T15" style:family="text">
      <style:text-properties officeooo:rsid="0013bfb3"/>
    </style:style>
    <style:style style:name="T16" style:family="text">
      <style:text-properties style:font-name="Google Sans Tex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KARA UNIVERSITY </text:p>
      <text:p text:style-name="P6">FACULTY OF ENGINEERING</text:p>
      <text:p text:style-name="P5">DEPARTMENT OF COMPUTER ENGINEERING</text:p>
      <text:p text:style-name="P4"><draw:frame draw:style-name="fr2" draw:name="image3.png" text:anchor-type="as-char" svg:width="5.001cm" svg:height="5.001cm" draw:z-index="0"><draw:image xlink:href="Pictures/10000000000001B1000001B1EA8010D20DED931E.png" xlink:type="simple" xlink:show="embed" xlink:actuate="onLoad" draw:mime-type="image/png"/></draw:frame></text:p>
      <text:p text:style-name="P5"/>
      <text:p text:style-name="P20">BLM4522 Ağ Tabanlı Paralel Tanıtım Sistemleri</text:p>
      <text:p text:style-name="P4"><text:span text:style-name="T10"><text:line-break/></text:span><text:span text:style-name="T5">Proje </text:span><text:span text:style-name="T6">1</text:span><text:span text:style-name="T5">: </text:span><text:span text:style-name="T7">Veritabanı Performans Optimizasyonu ve İzleme</text:span><text:span text:style-name="T11"><text:line-break/></text:span></text:p>
      <text:p text:style-name="P4"><text:span text:style-name="T3">T</text:span><text:span text:style-name="T4">uğrul Özgün</text:span><text:span text:style-name="T3"> </text:span></text:p>
      <text:p text:style-name="P4"><text:span text:style-name="T3">2</text:span><text:span text:style-name="T4">2290082</text:span></text:p>
      <text:h text:style-name="P25" text:outline-level="2"/>
      <text:h text:style-name="P26" text:outline-level="2"><text:span text:style-name="T8">Git link: </text:span><text:span text:style-name="T9">https://github.com/Forcipus/Paralel-Sistemler</text:span></text:h>
      <text:h text:style-name="P26" text:outline-level="2"><text:span text:style-name="T8">Video link: </text:span><text:span text:style-name="T9">https://drive.google.com/drive/folders/1aXqYA1RbEGioQ-7k64ovt--p6e0QNuGY?usp=sharing</text:span></text:h>
      <text:h text:style-name="P26" text:outline-level="2"><text:span text:style-name="Internet_20_link"><text:span text:style-name="T8"/></text:span></text:h>
      <text:h text:style-name="P26" text:outline-level="2"><text:soft-page-break/><text:span text:style-name="Internet_20_link"><text:span text:style-name="T8"/></text:span></text:h>
      <text:p text:style-name="P9">İÇİNDEKİLER</text:p>
      <text:p text:style-name="Text_20_body"><text:span text:style-name="T1">1. GİRİŞ VE AMAÇ</text:span> ......................................................................................................................... <text:span text:style-name="T13">2</text:span></text:p>
      <text:p text:style-name="P3"><text:bookmark text:name="p-rc_319d99fc0fbb5445-459"/>1.1. Ka<text:span text:style-name="T13">psam</text:span> ve Metodolojisi <text:s/></text:p>
      <text:p text:style-name="P3"/>
      <text:p text:style-name="P3"/>
      <text:p text:style-name="P17"><text:span text:style-name="T1">2. VERİTABANI İZLEME VE DARBOĞAZ TESPİTİ</text:span><text:span text:style-name="T12">..............</text:span>................................................. <text:span text:style-name="T15">3</text:span></text:p>
      <text:p text:style-name="P15"><text:bookmark text:name="p-rc_319d99fc0fbb5445-460"/>2.1. Performans Analizi İçin Kötü Sorgu Senaryosu <text:s/></text:p>
      <text:p text:style-name="P15">2.2. Grafiksel Yürütme Planı (Actual Execution Plan) ve Verimsizlik Analizi <text:s/></text:p>
      <text:p text:style-name="P3"/>
      <text:p text:style-name="P3"/>
      <text:p text:style-name="P17"><text:span text:style-name="T1">3. </text:span><text:span text:style-name="T14">İNDEKS YÖNETİCİSİ VE OPTİMİZASYON STRATEJİLERİ</text:span>........................................... 4</text:p>
      <text:p text:style-name="P3"><text:bookmark text:name="p-rc_319d99fc0fbb5445-461"/>3.1. Doğru Non-Clustered Index Tasarımı ve Fiziksel İnşa Maliyeti </text:p>
      <text:p text:style-name="P3">3.2. Dizin Ekleme Yürütme Planının Derinlemesine İncelenmesi </text:p>
      <text:p text:style-name="P15">3.3. Dinamik Yönetim Görüşleri (DMV) Kullanarak Atıl İndekslerin Temizlenmesi <text:s/></text:p>
      <text:p text:style-name="Quotations"/>
      <text:p text:style-name="P17"><text:span text:style-name="T1">4. MANTIKSAL SORGU İYİLEŞTİRME (QUERY TUNING)</text:span><text:span text:style-name="T12"> ......</text:span>.......................................... <text:span text:style-name="T15">6</text:span></text:p>
      <text:p text:style-name="P15"><text:bookmark text:name="p-rc_319d99fc0fbb5445-462"/>4.1. Fonksiyon Kullanımının İndeksler Üzerindeki Yıkıcı Etkisi (Non-Sargable) <text:s/></text:p>
      <text:p text:style-name="P15">4.2. Sargable Sorgu Tasarımı ve Bağıntılı Maliyet Karşılaştırması <text:s/></text:p>
      <text:p text:style-name="P3"/>
      <text:p text:style-name="P3"/>
      <text:p text:style-name="P17"><text:span text:style-name="T1">5. VERİ YÖNETİCİSİ ROLLERİ VE ERİŞİM KONTROLÜ</text:span>.................................................... <text:span text:style-name="T13">7</text:span></text:p>
      <text:p text:style-name="P3"><text:bookmark text:name="p-rc_319d99fc0fbb5445-463"/>5.1. En Az Yetki İlkesine Uygun Şema Bazlı Rol Tanımlamaları </text:p>
      <text:p text:style-name="P3">5.2. <text:span text:style-name="Source_20_Text">EXECUTE AS USER</text:span> ve <text:span text:style-name="Source_20_Text">SHOWPLAN</text:span> Yetki Duvarı Simülasyonu </text:p>
      <text:p text:style-name="Quotations"/>
      <text:p text:style-name="P7"><text:bookmark text:name="p-rc_319d99fc0fbb5445-464"/>6. <text:span text:style-name="T2">SONUÇ</text:span> .......................................................................................................................................... <text:span text:style-name="T13">8</text:span> </text:p>
      <text:h text:style-name="P26" text:outline-level="2"><text:span text:style-name="Internet_20_link"><text:span text:style-name="T8"/></text:span></text:h>
      <text:h text:style-name="P26" text:outline-level="2"><text:span text:style-name="Internet_20_link"><text:span text:style-name="T8"/></text:span></text:h>
      <text:h text:style-name="P26" text:outline-level="2"><text:span text:style-name="Internet_20_link"><text:span text:style-name="T8"/></text:span></text:h>
      <text:h text:style-name="P26" text:outline-level="2"><text:span text:style-name="Internet_20_link"><text:span text:style-name="T8"/></text:span></text:h>
      <text:h text:style-name="P11" text:outline-level="2"><text:soft-page-break/>1. GİRİŞ VE AMAÇ</text:h>
      <text:p text:style-name="Text_20_body">Kurumsal düzeydeki büyük ölçekli bilgi sistemlerinde veritabanları, sürekli büyüyen veri yoğunluğu ve eşzamanlı kullanıcı talepleri altında hizmet vermektedir. Veritabanlarında meydana gelen yavaşlıklar; donanım yetersizliklerinden ziyade genellikle kötü yazılmış SQL sorgularından, eksik veya hatalı indeks tasarımlarından ve sunucu kaynaklarının verimsiz tüketilmesinden kaynaklanmaktadır. Bir Veritabanı Yöneticisi (DBA) ve Bilgisayar Mühendisi için en kritik sorumluluk, sistemdeki darboğazları proaktif araçlarla izlemek, sorgu maliyetlerini analiz etmek ve mimariyi optimize etmektir. </text:p>
      <text:p text:style-name="Text_20_body">Bu projenin temel amacı, Microsoft SQL Server ortamında kurumsal veri setlerini içeren <text:span text:style-name="Source_20_Text">WideWorldImporters</text:span> örnek veritabanı üzerinde kapsamlı bir performans optimizasyonu ve izleme çalışması gerçekleştirmektir. Proje kapsamında, sistem kaynaklarını (CPU, RAM, Disk I/O) aşırı tüketen verimsiz yapılar kurgulanacak; grafiksel Yürütme Planları (Execution Plan), SQL Profiler mantığı ve Dinamik Yönetim Görüşleri (DMV) kullanılarak bu hatalar teşhis edilecektir[cite: 1]. Ardından, Non-Clustered Index tasarımları ve mantıksal sorgu iyileştirme teknikleri uygulanarak sistem performansı artırılacak ve veritabanı katmanında güvenli erişim rolleri kurulacaktır </text:p>
      <text:h text:style-name="Heading_20_3" text:outline-level="3">1.1. Kapsam ve Metodoloji</text:h>
      <text:p text:style-name="Text_20_body">Proje süresince gerçekleştirilen teknik adımlar ve kullanılan mühendislik metodolojileri aşağıda özetlenmiştir: </text:p>
      <text:list text:style-name="L1">
        <text:list-item>
          <text:p text:style-name="P28"><text:span text:style-name="T1">Sorgu Optimizasyonu ve İzleme:</text:span> Büyük tablolarda <text:span text:style-name="Source_20_Text">Table Scan</text:span> ve <text:span text:style-name="Source_20_Text">Clustered Index Scan</text:span> üreten verimsiz SQL kodları yazılmış, bunların maliyetleri grafiksel yürütme planları üzerinden dökümante edilmiştir.</text:p>
        </text:list-item>
        <text:list-item text:style-override="L2">
          <text:p text:style-name="P29"><text:span text:style-name="T1">İndeks Yönetimi:</text:span> Filtreleme kriterlerine ve sorgulanan kolon yapılarına tam uyumlu dinamik Non-Clustered (Covering) indeksler inşa edilmiştir.</text:p>
        </text:list-item>
        <text:list-item text:style-override="L3">
          <text:p text:style-name="P30"><text:span text:style-name="T1">Atıl Dizin Yönetimi:</text:span> Sunucu üzerinde gereksiz yazma yükü oluşturan ve hiç kullanılmayan atıl indeksler DMV sistem tabloları taranarak tespit edilmiş ve sistemden arındırılmıştır.</text:p>
        </text:list-item>
        <text:list-item text:style-override="L4">
          <text:p text:style-name="P31"><text:span text:style-name="T1">Güvenlik ve Erişim Kontrolü:</text:span> Veritabanı düzeyinde güvenlik bütünlüğünü korumak adına roller oluşturulmuş, şema bazlı yetkilendirmeler yapılmış ve kısıtlı kullanıcıların yürütme planlarını görmesini engelleyen <text:span text:style-name="Source_20_Text">SHOWPLAN</text:span> güvenlik duvarı simüle edilmişti<text:span text:style-name="T15">r</text:span>.</text:p>
        </text:list-item>
      </text:list>
      <text:p text:style-name="Text_20_body">Bu raporda, söz konusu tekniklerin uygulama adımları, karşılaşılan teknik engeller (kısıtlamalar, erişim hataları vb.) ve bu engellere yönelik geliştirilen mühendislik çözümleri detaylı bir şekilde dökümante edilmiştir.</text:p>
      <text:p text:style-name="Text_20_body"/>
      <text:p text:style-name="P12"/>
      <text:p text:style-name="P12"><text:soft-page-break/>2. VERİTABANI İZLEME VE DARBOĞAZ TESPİTİ </text:p>
      <text:p text:style-name="P2">Büyük ölçekli sistemlerde performans optimizasyonunun ilk adımı, kaynakları aşırı tüketen verimsiz sorguların proaktif araçlarla izlenmesidir. Bu bölümde, disk I/O darboğazı oluşturmak amacıyla <text:span text:style-name="Source_20_Text">Sales.InvoiceLines</text:span> tablosu üzerinde bilinçli olarak optimize edilmemiş bir sorgu kurgulanmıştır. Tetiklenen bu kodun sunucu üzerindeki yükü ve yapısal verimsizliği, SQL Server'ın grafiksel Yürütme Planı (Actual Execution Plan) üzerinden analiz edilerek dökümante edilmiştir. </text:p>
      <text:p text:style-name="P8">2.1. Performans Analizi İçin Kötü Sorgu Senaryosu </text:p>
      <text:p text:style-name="P21">Performans izleme süreçlerinin ilk adımı, veritabanını yoran ve optimizasyona muhtaç olan sorguların yakalanmasıdır. Bu aşamada, <text:span text:style-name="Source_20_Text">WideWorldImporters</text:span> sistemi içerisindeki en yüksek veri yoğunluğuna sahip tablolardan biri olan <text:span text:style-name="Source_20_Text">Sales.InvoiceLines</text:span> seçilmiştir. Tablo üzerinde, açıklama alanında metinsel arama yapan ve miktar filtresi içeren, diski bilinçli olarak yoracak aşağıdaki verimsiz T-SQL kodu kurgulanmıştır: </text:p>
      <text:p text:style-name="P1">SQL</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 1. ADIM: OPTİMİZE EDİLMEMİŞ KÖTÜ SORGUNUN TETİKLENMESİ</text:span></text:p>
      <text:p text:style-name="Preformatted_20_Text"><text:span text:style-name="Source_20_Text">SELECT InvoiceID, StockItemID, Quantity, UnitPrice, Description</text:span></text:p>
      <text:p text:style-name="Preformatted_20_Text"><text:span text:style-name="Source_20_Text">FROM Sales.InvoiceLines</text:span></text:p>
      <text:p text:style-name="Preformatted_20_Text"><text:span text:style-name="Source_20_Text">WHERE Description LIKE '%Red%' AND Quantity &gt; 50;</text:span></text:p>
      <text:p text:style-name="P18"><text:span text:style-name="Source_20_Text">GO</text:span></text:p>
      <text:p text:style-name="P1"/>
      <text:p text:style-name="P10"><text:span text:style-name="T1">2.2. Grafiksel Yürütme Planı (Actual Execution Plan) ve Verimsizlik Analizi</text:span> </text:p>
      <text:p text:style-name="Text_20_body">Yukarıdaki sorgu çalıştırılmadan önce,<draw:frame draw:style-name="fr1" draw:name="Image1" text:anchor-type="char" svg:x="8.082cm" svg:y="0.129cm" svg:width="9.888cm" svg:height="7.597cm" draw:z-index="1"><draw:image xlink:href="Pictures/100000010000054B000004117FD1D7F585BCD117.png" xlink:type="simple" xlink:show="embed" xlink:actuate="onLoad" draw:mime-type="image/png"/></draw:frame> SQL Server Management Studio (SSMS) arabiriminde yer alan <text:span text:style-name="T1">"Include Actual Execution Plan" (Ctrl+M)</text:span> özelliği aktif edilmiştir. Sorgu icra edildikten sonra üretilen grafiksel plan analiz edilmiştir.</text:p>
      <text:list text:style-name="L5">
        <text:list-item>
          <text:p text:style-name="P32"><text:span text:style-name="T1">Darboğaz Teşhisi:</text:span> Sorgu sonucunda elde edilen Yürütme Planında, veritabanı motorunun <text:span text:style-name="T1">"Kümelenmiş Dizin Tarama" (Clustered Index Scan)</text:span> yaptığı görülmüştür.</text:p>
        </text:list-item>
        <text:list-item>
          <text:p text:style-name="P33"><text:span text:style-name="T1">Maliyet Analizi:</text:span> Toplam sorgu maliyetinin (Query Cost) <text:span text:style-name="T1">%100</text:span>'lük kısmının tamamen bu tarama işlemine gittiği saptanmıştır. <text:span text:style-name="Source_20_Text">SELECT</text:span> operatörünün maliyeti ise <text:span text:style-name="T1">%0</text:span> olarak raporlanmıştır. Bu durum, SQL Server'ın hedef verileri bulabilmek için disk üzerindeki yüz binlerce satırı tek tek okuduğunu (I/O darboğazı), ancak veriyi bulduktan sonra ekrana basmasının hiçbir maliyet oluşturmadığını kanıtlamaktadır.</text:p>
        </text:list-item>
      </text:list>
      <text:p text:style-name="P12"><text:soft-page-break/>3. İNDEKS YÖNETİCİSİ VE OPTİMİZASYON STRATEJİLERİ </text:p>
      <text:p text:style-name="P24"><text:span text:style-name="T16">Veritabanı izleme araçlarıyla tespit edilen disk tarama (Scan) maliyetlerini ortadan kaldırmanın en efektif yolu doğru dizinlerin kurgulanmasıdır. Bu doğrultuda, filtre kriterlerine tam uyumlu bir Non-Clustered Covering Index inşa edilmiş ve bu indeksin sunucuya getirdiği fiziksel yazma yükü adım adım incelenmiştir. Ayrıca, sistem üzerinde gereksiz şişkinlik yaratan atıl dizinler Dinamik Yönetim Görüşleri (DMV) kullanılarak tespit edilmiş ve veritabanından temizlenmiştir.</text:span> </text:p>
      <text:p text:style-name="P8">3.1. Doğru Non-Clustered Index Tasarımı ve Fiziksel İnşa Maliyeti </text:p>
      <text:p text:style-name="Text_20_body">Bir önceki adımda tespit edilen <text:span text:style-name="Source_20_Text">Clustered Index Scan</text:span> (Tabloyu baştan sona okuma) verimsizliğini ortadan kaldırmak amacıyla bir indeks stratejisi geliştirilmiştir. Sorgunun <text:span text:style-name="Source_20_Text">WHERE</text:span> şartında ana filtreleme kolonu olan <text:span text:style-name="Source_20_Text">Quantity</text:span> alanı indeks anahtarı olarak belirlenmiştir. Sorgunun <text:span text:style-name="Source_20_Text">SELECT</text:span> kısmında istenen diğer kolonların (<text:span text:style-name="Source_20_Text">InvoiceID</text:span>, <text:span text:style-name="Source_20_Text">StockItemID</text:span>, <text:span text:style-name="Source_20_Text">UnitPrice</text:span>, <text:span text:style-name="Source_20_Text">Description</text:span>) ise diski ekstra yormaması adına indeksin yaprak düğümlerine (Leaf Nodes) <text:span text:style-name="Source_20_Text"><text:span text:style-name="T1">INCLUDE</text:span></text:span> katmanı olarak gömülmesi kararlaştırılmıştır (Covering Index).</text:p>
      <text:p text:style-name="Text_20_body">Aşağıdaki T-SQL komutu ile ilgili performans indeksi veritabanında fiziksel olarak inşa edilmiştir</text:p>
      <text:p text:style-name="Text_20_body">SQL</text:p>
      <text:p text:style-name="Preformatted_20_Text"><text:span text:style-name="Source_20_Text">-- 2. ADIM: PERFORMANSI UÇURACAK DOĞRU İNDEKSİN OLUŞTURULMASI</text:span></text:p>
      <text:p text:style-name="Preformatted_20_Text"><text:span text:style-name="Source_20_Text">CREATE NONCLUSTERED INDEX IX_Sales_InvoiceLines_Quantity_Perf</text:span></text:p>
      <text:p text:style-name="Preformatted_20_Text"><text:span text:style-name="Source_20_Text">ON Sales.InvoiceLines (Quantity)</text:span></text:p>
      <text:p text:style-name="Preformatted_20_Text"><text:span text:style-name="Source_20_Text">INCLUDE (InvoiceID, StockItemID, UnitPrice, Description);</text:span></text:p>
      <text:p text:style-name="P18"><text:span text:style-name="Source_20_Text">GO</text:span></text:p>
      <text:p text:style-name="Text_20_body"/>
      <text:p text:style-name="P8">3.2. Dizin Ekleme Yürütme Planının Derinlemesine İncelenmesi<draw:frame draw:style-name="fr1" draw:name="Image2" text:anchor-type="char" svg:x="8.056cm" svg:y="1.515cm" svg:width="9.827cm" svg:height="8.636cm" draw:z-index="2"><draw:image xlink:href="Pictures/1000000100000431000003AFC40129370882227F.png" xlink:type="simple" xlink:show="embed" xlink:actuate="onLoad" draw:mime-type="image/png"/></draw:frame></text:p>
      <text:p text:style-name="P22">İndeks oluşturma komutu yürütülürken arka planda SQL Server motorunun üstlendiği iş yükü şeması grafiksel olarak incelenmiştir. Planda yer alan düğümler sağdan sola doğru şu şekilde analiz edilmiştir:</text:p>
      <text:list text:style-name="L6">
        <text:list-item>
          <text:p text:style-name="P34"><text:span text:style-name="T1">Kümelenmiş Dizin Tarama (Clustered Index Scan) [Maliyet: %8]:</text:span> SQL Server, yeni kurulacak indeks yapısını beslemek üzere <text:span text:style-name="Source_20_Text">Sales.InvoiceLines</text:span> tablosundaki mevcut <text:span text:style-name="T1">228.265 satırın</text:span> tamamını diskten okumuştur.</text:p>
        </text:list-item>
        <text:list-item>
          <text:p text:style-name="P34"><text:soft-page-break/><text:span text:style-name="T1">Sırala (Sort) [Maliyet: %39]:</text:span> Diskten okunan 228.265 satır veri, indeksin arama ağacı (B-Tree) mantığına uygun şekilde sıralı saklanabilmesi için RAM üzerinde <text:span text:style-name="Source_20_Text">Quantity</text:span> kolonuna göre küçükten büyüğe dizilmiştir. Bu adım işlemciyi (CPU) en çok yoran ikinci alan olmuştur.</text:p>
        </text:list-item>
        <text:list-item>
          <text:p text:style-name="P34"><text:span text:style-name="T1">Dizin Ekleme (Index Insert) [Maliyet: %53]:</text:span> Sıralanan veriler, disk üzerinde kalıcı yeni bir fiziksel Non-Clustered Index mimarisi olarak yazılmıştır. Toplam maliyetin yarısından fazlasının (%53) burada çıkma sebebi, diske kalıcı veri yazma (I/O) işlemlerinin yüksek maliyetidir.</text:p>
        </text:list-item>
      </text:list>
      <text:p text:style-name="P8">3.3. Dinamik Yönetim Görüşleri (DMV) Kullanarak Atıl İndekslerin Temizlenmesi</text:p>
      <text:p text:style-name="Text_20_body">Veritabanlarında her Non-Clustered indeks okuma hızını artırsa da, tabloya yapılan yeni ekleme ve güncellemelerde (<text:span text:style-name="Source_20_Text">INSERT</text:span>, <text:span text:style-name="Source_20_Text">UPDATE</text:span>) arka planda sürekli güncellenmek zorunda olduğu için yazma performansını düşürür. Bu nedenle hiç kullanılmayan atıl indekslerin temizlenmesi gerekir. Sistemdeki atıl indeksleri tespit etmek için <text:span text:style-name="Source_20_Text">sys.dm_db_index_usage_stats</text:span> sistem tablosundan yararlanan aşağıdaki DMV sorgusu çalıştırılmıştır: </text:p>
      <text:p text:style-name="P19">SQL</text:p>
      <text:p text:style-name="Preformatted_20_Text"><text:span text:style-name="Source_20_Text">-- 3. ADIM: KULLANILMAYAN VE GEREKSİZ İNDEKSLEERİ TESPİT EDEN DMV SORGUSU</text:span></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SELECT </text:span></text:p>
      <text:p text:style-name="Preformatted_20_Text"><text:span text:style-name="Source_20_Text"><text:s text:c="4"/>OBJECT_NAME(i.object_id) AS [Tablo Adı],</text:span></text:p>
      <text:p text:style-name="Preformatted_20_Text"><text:span text:style-name="Source_20_Text"><text:s text:c="4"/>i.name AS [Gereksiz İndeks Adı],</text:span></text:p>
      <text:p text:style-name="Preformatted_20_Text"><text:span text:style-name="Source_20_Text"><text:s text:c="4"/>user_seeks AS [Arama (Seek) Sayısı],</text:span></text:p>
      <text:p text:style-name="Preformatted_20_Text"><text:span text:style-name="Source_20_Text"><text:s text:c="4"/>user_scans AS [Tarama (Scan) Sayısı],</text:span></text:p>
      <text:p text:style-name="Preformatted_20_Text"><text:span text:style-name="Source_20_Text"><text:s text:c="4"/>user_updates AS [Güncelleme/Yazma Maliyeti]</text:span></text:p>
      <text:p text:style-name="Preformatted_20_Text"><text:span text:style-name="Source_20_Text">FROM sys.indexes i</text:span></text:p>
      <text:p text:style-name="Preformatted_20_Text"><text:span text:style-name="Source_20_Text">INNER JOIN sys.dm_db_index_usage_stats s </text:span></text:p>
      <text:p text:style-name="Preformatted_20_Text"><text:span text:style-name="Source_20_Text"><text:s text:c="4"/>ON s.object_id = i.object_id AND s.index_id = i.index_id</text:span></text:p>
      <text:p text:style-name="Preformatted_20_Text"><text:span text:style-name="Source_20_Text">WHERE OBJECTPROPERTY(i.object_id, 'IsUserTable') = 1</text:span></text:p>
      <text:p text:style-name="Preformatted_20_Text"><text:span text:style-name="Source_20_Text"><text:s text:c="2"/>AND user_seeks = 0 -- Hiç nokta atışı aramada kullanılmamış</text:span></text:p>
      <text:p text:style-name="Preformatted_20_Text"><text:span text:style-name="Source_20_Text"><text:s text:c="2"/>AND i.type_desc = 'NONCLUSTERED'</text:span></text:p>
      <text:p text:style-name="Preformatted_20_Text"><text:span text:style-name="Source_20_Text">ORDER BY user_updates DESC;</text:span></text:p>
      <text:p text:style-name="P18"><text:span text:style-name="Source_20_Text">GO</text:span></text:p>
      <text:p text:style-name="Text_20_body"><text:span text:style-name="Source_20_Text">WideWorldImporters</text:span> veritabanı kurumsal düzeyde optimize bir sistem olduğu için ilk etapta boş sonuç (0 satır) dönmüştür. Mekanizmanın çalıştığını simüle etmek adına sisteme yapıcı bir test indeksi (<text:span text:style-name="Source_20_Text">IX_Gereksiz_Test_IadeKodu</text:span>) eklenmiş, DMV sorgusunun bu atıl dizini başarıyla yakaladığı gözlemlenmiştir. Tespit edilen bu gereksiz indeks aşağıdaki komutla sistemden tamamen DROP edilerek kaynak yönetimi sağlanmıştır: </text:p>
      <text:p text:style-name="P19">SQL</text:p>
      <text:p text:style-name="Preformatted_20_Text"><text:span text:style-name="Source_20_Text">-- 4. ADIM: TESPİT EDİLEN ATIL İNDEKSİN SİLİNMESİ</text:span></text:p>
      <text:p text:style-name="Preformatted_20_Text"><text:span text:style-name="Source_20_Text">DROP INDEX IX_Gereksiz_Test_IadeKodu ON Sales.Invoices;</text:span></text:p>
      <text:p text:style-name="P18"><text:span text:style-name="Source_20_Text">GO</text:span></text:p>
      <text:h text:style-name="Heading_20_2" text:outline-level="2"><text:soft-page-break/><text:span text:style-name="T1">4. MANTIKSAL SORGU İYİLEŞTİRME (QUERY TUNING)</text:span> <text:s/></text:h>
      <text:p text:style-name="P16">Performans optimizasyonu sadece yeni indeksler eklemekle sınırlı olmayıp, mevcut SQL kodlarının yazım mantığını iyileştirmeyi de kapsar. <text:span text:style-name="Source_20_Text">WHERE</text:span> filtresi içerisinde kolonların fonksiyonlar arasına hapsedilmesi, indekslerin kırılmasına ve sistemin yavaşlamasına neden olan genel bir yazılım hatasıdır. Bu bölümde, fonksiyon kullanımının performans üzerindeki yıkıcı etkisi deneysel olarak gösterilmiş ve kod yapısı "Sargable" standardına dönüştürülerek maliyet karşılaştırması yapılmıştır. </text:p>
      <text:p text:style-name="P16"/>
      <text:h text:style-name="P27" text:outline-level="3"><text:span text:style-name="T1">4.1. Fonksiyon Kullanımının İndeksler Üzerindeki Yıkıcı Etkisi (Non-Sargable)</text:span> </text:h>
      <text:p text:style-name="Text_20_body">Veritabanı performans optimizasyonlarında sadece indeks eklemek yeterli değildir; sorguların yazım biçimi de hayati önem taşır[cite: 1]. SQL Server'da <text:span text:style-name="Source_20_Text">WHERE</text:span> filtresi içerisindeki kolonlar herhangi bir fonksiyonun (Örn: <text:span text:style-name="Source_20_Text">YEAR()</text:span>, <text:span text:style-name="Source_20_Text">LEFT()</text:span>, <text:span text:style-name="Source_20_Text">SUBSTRING()</text:span>) içerisine alınırsa, o kolonda indeks tanımlı olsa bile veritabanı motoru indeksi kullanamaz ve tüm tabloyu tarar. Bu tarz sorgulara literatürde <text:span text:style-name="T1">"Non-Sargable Query"</text:span> denir.</text:p>
      <text:p text:style-name="Text_20_body">Aşağıda, 2013 yılında açılmış hesapları listelemek isteyen bir yazılımcının yazdığı, sistemi yoran verimsiz kod şeması yer almaktadır:</text:p>
      <text:p text:style-name="P19">SQL</text:p>
      <text:p text:style-name="Preformatted_20_Text"><text:span text:style-name="Source_20_Text">-- 5.1. KÖTÜ SORGU (Sargable Olmayan - İndeksi Kıran Mantık)</text:span></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SELECT CustomerID, CustomerName, AccountOpenedDate</text:span></text:p>
      <text:p text:style-name="Preformatted_20_Text"><text:span text:style-name="Source_20_Text">FROM Sales.Customers</text:span></text:p>
      <text:p text:style-name="Preformatted_20_Text"><text:span text:style-name="Source_20_Text">WHERE YEAR(AccountOpenedDate) = 2013; -- Kolon fonksiyon içine hapsedilmiş</text:span></text:p>
      <text:p text:style-name="P18"><text:span text:style-name="Source_20_Text">GO</text:span></text:p>
      <text:h text:style-name="Heading_20_3" text:outline-level="3" text:is-list-header="true"><text:span text:style-name="T1">4.2. Sargable Sorgu Tasarımı ve Bağıntılı Maliyet Karşılaştırması</text:span> </text:h>
      <text:p text:style-name="Text_20_body">Yukarıdaki mantıksal hatayı düzeltmek ve kolondaki mevcut indeks yapılarının sonuna kadar kullanılmasını sağlamak adına sorgu, net tarih aralıklarına bölünerek <text:span text:style-name="T1">Sargable</text:span> (performans dostu) hale getirilmiştir: </text:p>
      <text:p text:style-name="P19">SQL</text:p>
      <text:p text:style-name="Preformatted_20_Text"><text:span text:style-name="Source_20_Text">-- 5.2. İYİLEŞTİRİLMİŞ SORGU (Sargable - Performans Dostu Mantık)</text:span></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SELECT CustomerID, CustomerName, AccountOpenedDate</text:span></text:p>
      <text:p text:style-name="Preformatted_20_Text"><text:span text:style-name="Source_20_Text">FROM Sales.Customers</text:span></text:p>
      <text:p text:style-name="Preformatted_20_Text"><text:span text:style-name="Source_20_Text">WHERE AccountOpenedDate &gt;= '2013-01-01' AND AccountOpenedDate &lt;= '2013-12-31';</text:span></text:p>
      <text:p text:style-name="P18"><text:span text:style-name="Source_20_Text">GO</text:span></text:p>
      <text:p text:style-name="Text_20_body"><text:span text:style-name="T1">Yürütme Planı Karşılaştırma Sonucu:</text:span> Her iki sorgu aynı anda seçilip çalıştırıldığında, SQL Server iki işlemin maliyetini alt alta kıyaslamıştır. Fonksiyon içeren ilk sorgunun toplam paket içindeki yükü <text:span text:style-name="T1">%75</text:span> olarak raporlanırken, kodlama mantığı iyileştirilen ikinci sorgunun maliyeti <text:soft-page-break/><text:span text:style-name="T1">%25</text:span> olarak ölçülmüştür. Bu deney, veritabanına hiç dokunmadan sadece algoritma yazım biçimini değiştirerek performansın 3 kat artırılabileceğini mühendislik gözüyle kanıtlamıştır. </text:p>
      <text:h text:style-name="P13" text:outline-level="2">5. VERI YÖNETİCİSİ ROLLERİ VE ERİŞİM KONTROLÜ </text:h>
      <text:p text:style-name="P7"><text:span text:style-name="T16">Veritabanı yönetiminde performans kararlılığını sürdürmek, yetkisiz kullanıcıların sisteme verebileceği zararları engellemekle doğrudan ilişkilidir. En Az Yetki İlkesi uyarınca, veritabanı katmanında şema bazlı erişim sınırlarına sahip "Analist" ve "Geliştirici" iş rolleri kurgulanmıştır. Bu rollerin yetki sınırları </text:span><text:span text:style-name="Source_20_Text"><text:span text:style-name="T16">EXECUTE AS USER</text:span></text:span><text:span text:style-name="T16"> komutuyla canlı olarak simüle edilmiş ve kısıtlı kullanıcıların yürütme planlarını görmesini engelleyen </text:span><text:span text:style-name="Source_20_Text"><text:span text:style-name="T16">SHOWPLAN</text:span></text:span><text:span text:style-name="T16"> güvenlik protokolü test edilmiştir.</text:span> </text:p>
      <text:h text:style-name="Heading_20_3" text:outline-level="3" text:is-list-header="true"><text:span text:style-name="T1">5.1. En Az Yetki İlkesine Uygun Şema Bazlı Rol Tanımlamaları</text:span> </text:h>
      <text:p text:style-name="Text_20_body">Veritabanı optimizasyonunun ve yönetiminin son adımı veri güvenliğini sağlamaktır[cite: 1]. Siber güvenlik ve veritabanı yönetim standartlarında yer alan "En Az Yetki İlkesi" (Least Privilege Principle) uyarınca, sisteme bağlanan istemcilere sadece görev tanımlarına yetecek kadar hak tanımlanmalıdır. Bu amaçla veritabanı katmanında iki adet kurumsal rol ve bu rollere bağlı test kullanıcıları kurgulanmıştır </text:p>
      <text:p text:style-name="P19">SQL</text:p>
      <text:p text:style-name="Preformatted_20_Text"><text:span text:style-name="Source_20_Text">-- 6. ADIM: ROLLERİN VE YETKİLERİN TANIMLANMASI</text:span></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 Rollerin Oluşturulması</text:span></text:p>
      <text:p text:style-name="Preformatted_20_Text"><text:span text:style-name="Source_20_Text">CREATE ROLE Veri_Analisti_Rolu;</text:span></text:p>
      <text:p text:style-name="Preformatted_20_Text"><text:span text:style-name="Source_20_Text">CREATE ROLE Yazilim_Gelistirici_Rolu;</text:span></text:p>
      <text:p text:style-name="Preformatted_20_Text"><text:span text:style-name="Source_20_Text">GO</text:span></text:p>
      <text:p text:style-name="Preformatted_20_Text"/>
      <text:p text:style-name="Preformatted_20_Text"><text:span text:style-name="Source_20_Text">-- Şema Bazlı Sınırlandırma</text:span></text:p>
      <text:p text:style-name="Preformatted_20_Text"><text:span text:style-name="Source_20_Text">GRANT SELECT ON SCHEMA::Sales TO Veri_Analisti_Rolu; -- Analist sadece okuyabilir</text:span></text:p>
      <text:p text:style-name="Preformatted_20_Text"><text:span text:style-name="Source_20_Text">GRANT SELECT, INSERT, UPDATE, DELETE ON SCHEMA::Sales TO Yazilim_Gelistirici_Rolu; -- Dev yazabilir</text:span></text:p>
      <text:p text:style-name="Preformatted_20_Text"><text:span text:style-name="Source_20_Text">GO</text:span></text:p>
      <text:p text:style-name="Preformatted_20_Text"/>
      <text:p text:style-name="Preformatted_20_Text"><text:span text:style-name="Source_20_Text">-- Sistem Login ve Kullanıcılarının İnşası</text:span></text:p>
      <text:p text:style-name="Preformatted_20_Text"><text:span text:style-name="Source_20_Text">CREATE LOGIN AnalistTugrul WITH PASSWORD = 'Sifre123_Analist';</text:span></text:p>
      <text:p text:style-name="Preformatted_20_Text"><text:span text:style-name="Source_20_Text">CREATE LOGIN GelistiriciTugrul WITH PASSWORD = 'Sifre123_Dev';</text:span></text:p>
      <text:p text:style-name="Preformatted_20_Text"><text:span text:style-name="Source_20_Text">GO</text:span></text:p>
      <text:p text:style-name="Preformatted_20_Text"/>
      <text:p text:style-name="Preformatted_20_Text"><text:span text:style-name="Source_20_Text">CREATE USER U_Analist FOR LOGIN AnalistTugrul;</text:span></text:p>
      <text:p text:style-name="Preformatted_20_Text"><text:span text:style-name="Source_20_Text">CREATE USER U_Gelistirici FOR LOGIN GelistiriciTugrul;</text:span></text:p>
      <text:p text:style-name="Preformatted_20_Text"><text:span text:style-name="Source_20_Text">GO</text:span></text:p>
      <text:p text:style-name="Preformatted_20_Text"/>
      <text:p text:style-name="Preformatted_20_Text"><text:span text:style-name="Source_20_Text">-- Kullanıcıların Rollere Atanması</text:span></text:p>
      <text:p text:style-name="Preformatted_20_Text"><text:span text:style-name="Source_20_Text">ALTER ROLE Veri_Analisti_Rolu ADD MEMBER U_Analist;</text:span></text:p>
      <text:p text:style-name="Preformatted_20_Text"><text:span text:style-name="Source_20_Text">ALTER ROLE Yazilim_Gelistirici_Rolu ADD MEMBER U_Gelistirici;</text:span></text:p>
      <text:p text:style-name="P18"><text:span text:style-name="Source_20_Text">GO</text:span></text:p>
      <text:p text:style-name="P18"><text:span text:style-name="Source_20_Text"/></text:p>
      <text:h text:style-name="Heading_20_3" text:outline-level="3" text:is-list-header="true"><text:soft-page-break/>5.2. <text:span text:style-name="Source_20_Text">EXECUTE AS USER</text:span> ve <text:span text:style-name="Source_20_Text">SHOWPLAN</text:span> Yetki Duvarı Simülasyonu </text:h>
      <text:p text:style-name="Text_20_body">Oluşturulan rollerin yetki sınırları <text:span text:style-name="Source_20_Text">EXECUTE AS USER</text:span> komutuyla canlı olarak simüle edilmiştir. İlk test oturumunda, kısıtlı yetkili kullanıcıların veritabanının iç şemasını ve indeks planlarını görmesini engelleyen <text:span text:style-name="Source_20_Text"><text:span text:style-name="T1">SHOWPLAN permission denied</text:span></text:span> güvenlik duvarıyla karşılaşılmıştır. Bu durum, admin katmanında ilgili rollere güvenli izleme yetkisi verilerek aşılmıştır: </text:p>
      <text:p text:style-name="P19">SQL<draw:frame draw:style-name="fr1" draw:name="Image3" text:anchor-type="char" svg:x="9.491cm" svg:y="0.076cm" svg:width="8.133cm" svg:height="7.463cm" draw:z-index="3"><draw:image xlink:href="Pictures/10000001000003FD000003A94B074B3D762F7672.png" xlink:type="simple" xlink:show="embed" xlink:actuate="onLoad" draw:mime-type="image/png"/></draw:frame></text:p>
      <text:p text:style-name="Preformatted_20_Text"><text:span text:style-name="Source_20_Text">-- Güvenlik İzleme ve Kimliğe Bürünme Yetkilerinin Tanımlanması</text:span></text:p>
      <text:p text:style-name="Preformatted_20_Text"><text:span text:style-name="Source_20_Text">GRANT SHOWPLAN TO Veri_Analisti_Rolu;</text:span></text:p>
      <text:p text:style-name="Preformatted_20_Text"><text:span text:style-name="Source_20_Text">GRANT SHOWPLAN TO Yazilim_Gelistirici_Rolu;</text:span></text:p>
      <text:p text:style-name="Preformatted_20_Text"><text:span text:style-name="Source_20_Text">GRANT IMPERSONATE ON USER::U_Analist TO public;</text:span></text:p>
      <text:p text:style-name="Preformatted_20_Text"><text:span text:style-name="Source_20_Text">GRANT IMPERSONATE ON USER::U_Gelistirici TO public;</text:span></text:p>
      <text:p text:style-name="Preformatted_20_Text"><text:span text:style-name="Source_20_Text">GO</text:span></text:p>
      <text:p text:style-name="Preformatted_20_Text"/>
      <text:p text:style-name="Preformatted_20_Text"><text:span text:style-name="Source_20_Text">-- CANLI YETKİ TESTİ</text:span></text:p>
      <text:p text:style-name="Preformatted_20_Text"><text:span text:style-name="Source_20_Text">EXECUTE AS USER = 'U_Analist';</text:span></text:p>
      <text:p text:style-name="Preformatted_20_Text"><text:span text:style-name="Source_20_Text">GO</text:span></text:p>
      <text:p text:style-name="Preformatted_20_Text"/>
      <text:p text:style-name="Preformatted_20_Text"><text:span text:style-name="Source_20_Text">-- 1. Test: Veri Okuma (BAŞARILI)</text:span></text:p>
      <text:p text:style-name="Preformatted_20_Text"><text:span text:style-name="Source_20_Text">SELECT TOP 5 CustomerID, CustomerName FROM Sales.Customers;</text:span></text:p>
      <text:p text:style-name="Preformatted_20_Text"/>
      <text:p text:style-name="Preformatted_20_Text"><text:span text:style-name="Source_20_Text">-- 2. Test: Veri Silme Simülasyonu (REDDEDİLDİ - HATA ALINDI)</text:span></text:p>
      <text:p text:style-name="Preformatted_20_Text"><text:span text:style-name="Source_20_Text">-- Hata: The DELETE permission was denied on the object 'Customers'...</text:span></text:p>
      <text:p text:style-name="Preformatted_20_Text"><text:span text:style-name="Source_20_Text">DELETE FROM Sales.Customers WHERE CustomerID = 1;</text:span></text:p>
      <text:p text:style-name="Preformatted_20_Text"><text:span text:style-name="Source_20_Text">GO</text:span></text:p>
      <text:p text:style-name="Preformatted_20_Text"/>
      <text:p text:style-name="Preformatted_20_Text"><text:span text:style-name="Source_20_Text">REVERT; -- Kendi kimliğimize geri dönüyoruz</text:span></text:p>
      <text:p text:style-name="P18"><text:span text:style-name="Source_20_Text">GO</text:span></text:p>
      <text:p text:style-name="Text_20_body">Sorgu çıktılarında, <text:span text:style-name="Source_20_Text">U_Analist</text:span> kullanıcısının verileri başarıyla listeleyebildiği ancak yetki alanı dışındaki <text:span text:style-name="Source_20_Text">DELETE</text:span> komutunu çalıştırmak istediğinde sistem tarafından kırmızı hata ekranıyla engellendiği doğrulanmıştır. </text:p>
      <text:h text:style-name="P14" text:outline-level="2"><text:span text:style-name="T13">6</text:span>. SONUÇ</text:h>
      <text:p text:style-name="P23"><text:span text:style-name="T2">Proje 1 </text:span>çalışması kapsamında gerçekleştirilen performans optimizasyon ve izleme süreçleri, ilişkisel veritabanı yönetim sistemlerinin (RDBMS) arka plandaki çalışma mekanizmalarını derinlemesine anlamamızı sağlamıştır.</text:p>
      <text:p text:style-name="Text_20_body">Grafiksel yürütme planları analiz edilerek darboğaz yaratan <text:span text:style-name="Source_20_Text">Clustered Index Scan</text:span> işlemleri tespit edilmiş, nokta atışı kurgulanan Non-Clustered Covering Index tasarımlarıyla disk I/O ve RAM maliyetleri minimuma indirilmiştir. Sorgu yazımında fonksiyon kullanımının indeksleri kırdığı deneysel olarak kanıtlanmış ve kod seviyesinde iyileştirmeler yapılmıştır. Son aşamada ise, şema bazlı veritabanı rolleri ve güvenlik duvarı yetkilendirmeleri (<text:span text:style-name="Source_20_Text">SHOWPLAN</text:span>, <text:span text:style-name="Source_20_Text">IMPERSONATE</text:span>) entegre edilerek kurumsal düzeyde hem hızlı, hem performanslı hem de yüksek güvenlikli bir veritabanı mimarisi başarıyla elde edilmişti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08T15:13:42.233000000</dc:date>
    <meta:editing-duration>PT2H29M5S</meta:editing-duration>
    <meta:editing-cycles>9</meta:editing-cycles>
    <meta:generator>LibreOffice/7.4.1.2$Windows_X86_64 LibreOffice_project/3c58a8f3a960df8bc8fd77b461821e42c061c5f0</meta:generator>
    <meta:document-statistic meta:table-count="0" meta:image-count="4" meta:object-count="0" meta:page-count="9" meta:paragraph-count="169" meta:word-count="1953" meta:character-count="16465" meta:non-whitespace-character-count="14612"/>
  </office:meta>
</office:document-meta>
</file>