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1000001B1EA8010D20DED931E.png" manifest:media-type="image/png"/>
  <manifest:file-entry manifest:full-path="Pictures/10000001000004C50000038DF913F0A983F64A67.png" manifest:media-type="image/png"/>
  <manifest:file-entry manifest:full-path="Pictures/10000001000003D10000038D8DD2BE5093A7745F.png" manifest:media-type="image/png"/>
  <manifest:file-entry manifest:full-path="Pictures/10000001000004E10000038E7846D9503AA91E00.png" manifest:media-type="image/png"/>
  <manifest:file-entry manifest:full-path="Pictures/10000001000004D50000038B87DFD256DC329C06.png" manifest:media-type="image/png"/>
  <manifest:file-entry manifest:full-path="Pictures/10000001000004B10000038939308409BEF58A4F.png" manifest:media-type="image/png"/>
  <manifest:file-entry manifest:full-path="Pictures/10000001000004910000038D4E81F199B63D41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Heading_20_2">
      <style:text-properties style:font-name="Liberation Serif" fo:font-size="18pt" fo:font-weight="bold" officeooo:paragraph-rsid="000beea1" style:font-size-asian="18pt" style:font-weight-asian="bold" style:font-size-complex="18pt" style:font-weight-complex="bold"/>
    </style:style>
    <style:style style:name="P3" style:family="paragraph" style:parent-style-name="Heading_20_2">
      <style:text-properties style:font-name="Liberation Serif" officeooo:paragraph-rsid="000beea1"/>
    </style:style>
    <style:style style:name="P4" style:family="paragraph" style:parent-style-name="Heading_20_2">
      <style:text-properties style:font-name="Liberation Serif"/>
    </style:style>
    <style:style style:name="P5" style:family="paragraph" style:parent-style-name="Heading_20_2">
      <style:text-properties style:font-name="Liberation Serif" fo:font-weight="bold" officeooo:rsid="000eb384" officeooo:paragraph-rsid="000beea1" style:font-weight-asian="bold" style:font-weight-complex="bold"/>
    </style:style>
    <style:style style:name="P6" style:family="paragraph" style:parent-style-name="Heading_20_3">
      <style:text-properties style:font-name="Liberation Serif"/>
    </style:style>
    <style:style style:name="P7" style:family="paragraph" style:parent-style-name="Heading_20_3">
      <style:text-properties style:font-name="Liberation Serif" officeooo:paragraph-rsid="000beea1"/>
    </style:style>
    <style:style style:name="P8" style:family="paragraph" style:parent-style-name="Preformatted_20_Text" style:list-style-name="L11">
      <style:paragraph-properties fo:margin-top="0cm" fo:margin-bottom="0.499cm" style:contextual-spacing="false"/>
    </style:style>
    <style:style style:name="P9" style:family="paragraph" style:parent-style-name="Preformatted_20_Text" style:list-style-name="L14"/>
    <style:style style:name="P10" style:family="paragraph" style:parent-style-name="Preformatted_20_Text" style:list-style-name="L14">
      <style:paragraph-properties fo:margin-top="0cm" fo:margin-bottom="0.499cm" style:contextual-spacing="false"/>
    </style:style>
    <style:style style:name="P11" style:family="paragraph" style:parent-style-name="Preformatted_20_Text" style:list-style-name="L16"/>
    <style:style style:name="P12" style:family="paragraph" style:parent-style-name="Preformatted_20_Text" style:list-style-name="L16">
      <style:paragraph-properties fo:margin-top="0cm" fo:margin-bottom="0.499cm" style:contextual-spacing="false"/>
    </style:style>
    <style:style style:name="P13" style:family="paragraph" style:parent-style-name="Preformatted_20_Text">
      <style:paragraph-properties fo:margin-top="0cm" fo:margin-bottom="0.499cm" style:contextual-spacing="false"/>
    </style:style>
    <style:style style:name="P14" style:family="paragraph" style:parent-style-name="Preformatted_20_Text">
      <style:text-properties style:font-name="Liberation Serif"/>
    </style:style>
    <style:style style:name="P15" style:family="paragraph" style:parent-style-name="Standard" style:list-style-name="">
      <style:paragraph-properties fo:margin-top="0.494cm" fo:margin-bottom="0.494cm" style:contextual-spacing="false" fo:line-height="100%"/>
      <style:text-properties officeooo:paragraph-rsid="000beea1"/>
    </style:style>
    <style:style style:name="P16" style:family="paragraph" style:parent-style-name="Standard">
      <style:paragraph-properties fo:margin-top="0cm" fo:margin-bottom="0cm" style:contextual-spacing="false" fo:line-height="150%" fo:text-align="center" style:justify-single-word="false"/>
      <style:text-properties style:font-name="Liberation Serif" fo:font-size="14pt" fo:font-weight="bold" officeooo:paragraph-rsid="000beea1" style:font-name-asian="Arial1" style:font-size-asian="14pt" style:font-weight-asian="bold" style:font-name-complex="Arial1" style:font-size-complex="14pt" style:font-weight-complex="bold"/>
    </style:style>
    <style:style style:name="P17" style:family="paragraph" style:parent-style-name="Standard">
      <style:paragraph-properties fo:margin-top="0cm" fo:margin-bottom="0.635cm" style:contextual-spacing="false" fo:line-height="150%" fo:text-align="center" style:justify-single-word="false"/>
      <style:text-properties style:font-name="Liberation Serif" fo:font-size="14pt" fo:font-weight="bold" officeooo:paragraph-rsid="000beea1" style:font-name-asian="Arial1" style:font-size-asian="14pt" style:font-weight-asian="bold" style:font-name-complex="Arial1" style:font-size-complex="14pt" style:font-weight-complex="bold"/>
    </style:style>
    <style:style style:name="P18" style:family="paragraph" style:parent-style-name="Standard">
      <style:paragraph-properties fo:margin-top="0cm" fo:margin-bottom="0.635cm" style:contextual-spacing="false" fo:line-height="150%" fo:text-align="center" style:justify-single-word="false"/>
      <style:text-properties style:font-name="Liberation Serif" officeooo:paragraph-rsid="000beea1"/>
    </style:style>
    <style:style style:name="P19" style:family="paragraph" style:parent-style-name="Standard">
      <style:paragraph-properties fo:margin-top="0cm" fo:margin-bottom="0.635cm" style:contextual-spacing="false" fo:line-height="150%" fo:text-align="center" style:justify-single-word="false"/>
      <style:text-properties style:font-name="Liberation Serif" officeooo:paragraph-rsid="0013e268"/>
    </style:style>
    <style:style style:name="P20" style:family="paragraph" style:parent-style-name="Standard">
      <style:paragraph-properties fo:margin-top="0cm" fo:margin-bottom="0.635cm" style:contextual-spacing="false" fo:line-height="150%" fo:text-align="center" style:justify-single-word="false"/>
      <style:text-properties style:font-name="Liberation Serif" fo:font-size="16pt" fo:font-weight="bold" officeooo:paragraph-rsid="000beea1" style:font-size-asian="16pt" style:font-weight-asian="bold" style:font-name-complex="Times New Roman1" style:font-size-complex="16pt"/>
    </style:style>
    <style:style style:name="P21" style:family="paragraph" style:parent-style-name="Standard" style:list-style-name="">
      <style:paragraph-properties fo:margin-top="0.494cm" fo:margin-bottom="0.494cm" style:contextual-spacing="false" fo:line-height="100%"/>
      <style:text-properties style:font-name="Liberation Serif" fo:font-size="18pt" fo:font-weight="bold" officeooo:paragraph-rsid="000beea1" style:font-name-asian="Times New Roman1" style:font-size-asian="18pt" style:language-asian="tr" style:country-asian="TR" style:font-weight-asian="bold" style:font-name-complex="Times New Roman1" style:font-size-complex="18pt" style:font-weight-complex="bold"/>
    </style:style>
    <style:style style:name="P22" style:family="paragraph" style:parent-style-name="Standard" style:list-style-name="">
      <style:paragraph-properties fo:margin-top="0.494cm" fo:margin-bottom="0.494cm" style:contextual-spacing="false" fo:line-height="100%"/>
      <style:text-properties style:font-name="Liberation Serif" officeooo:paragraph-rsid="000beea1"/>
    </style:style>
    <style:style style:name="P23" style:family="paragraph" style:parent-style-name="Standard">
      <style:text-properties style:font-name="Liberation Serif" officeooo:paragraph-rsid="000beea1"/>
    </style:style>
    <style:style style:name="P24" style:family="paragraph" style:parent-style-name="Standard">
      <style:paragraph-properties fo:margin-top="0cm" fo:margin-bottom="0.499cm" style:contextual-spacing="false"/>
      <style:text-properties style:font-name="Liberation Serif"/>
    </style:style>
    <style:style style:name="P25" style:family="paragraph" style:parent-style-name="Standard">
      <style:paragraph-properties fo:margin-top="0cm" fo:margin-bottom="0.499cm" style:contextual-spacing="false"/>
      <style:text-properties style:font-name="Liberation Serif" fo:font-size="12pt" fo:font-weight="normal" style:font-size-asian="12pt" style:font-weight-asian="normal" style:font-size-complex="12pt" style:font-weight-complex="normal"/>
    </style:style>
    <style:style style:name="P26" style:family="paragraph" style:parent-style-name="Text_20_body">
      <style:text-properties fo:font-size="12pt" fo:font-weight="normal" style:font-size-asian="12pt" style:font-weight-asian="normal" style:font-size-complex="12pt" style:font-weight-complex="normal"/>
    </style:style>
    <style:style style:name="P27" style:family="paragraph" style:parent-style-name="Text_20_body" style:list-style-name="L11"/>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text-properties fo:font-weight="bold"/>
    </style:style>
    <style:style style:name="P33" style:family="paragraph" style:parent-style-name="Text_20_body" style:list-style-name="L22">
      <style:paragraph-properties fo:margin-top="0cm" fo:margin-bottom="0.499cm" style:contextual-spacing="false" fo:line-height="114%" fo:padding="0cm" fo:border="none"/>
      <style:text-properties style:font-name="Liberation Serif" fo:font-size="12pt" style:font-size-asian="12pt" style:font-size-complex="12pt"/>
    </style:style>
    <style:style style:name="P34" style:family="paragraph" style:parent-style-name="Text_20_body" style:list-style-name="L22">
      <style:paragraph-properties fo:margin-top="0cm" fo:margin-bottom="0.499cm" style:contextual-spacing="false" fo:line-height="114%" fo:padding="0cm" fo:border="none"/>
      <style:text-properties style:font-name="Liberation Serif" fo:font-size="12pt" officeooo:paragraph-rsid="0013e268" style:font-size-asian="12pt" style:font-size-complex="12pt"/>
    </style:style>
    <style:style style:name="P35" style:family="paragraph" style:parent-style-name="Text_20_body">
      <style:text-properties style:font-name="Liberation Serif" fo:font-size="12pt" officeooo:paragraph-rsid="000c4c1f" style:font-size-asian="12pt" style:font-size-complex="12pt"/>
    </style:style>
    <style:style style:name="P36" style:family="paragraph" style:parent-style-name="Text_20_body">
      <style:text-properties style:font-name="Liberation Serif" fo:font-size="12pt" fo:font-weight="normal" style:font-size-asian="12pt" style:font-weight-asian="normal" style:font-size-complex="12pt" style:font-weight-complex="normal"/>
    </style:style>
    <style:style style:name="P37" style:family="paragraph" style:parent-style-name="Text_20_body">
      <style:text-properties style:font-name="Liberation Serif"/>
    </style:style>
    <style:style style:name="P38" style:family="paragraph" style:parent-style-name="Text_20_body">
      <style:paragraph-properties fo:margin-top="0cm" fo:margin-bottom="0.499cm" style:contextual-spacing="false" fo:line-height="114%"/>
      <style:text-properties style:font-name="Liberation Serif"/>
    </style:style>
    <style:style style:name="P39" style:family="paragraph" style:parent-style-name="Text_20_body" style:list-style-name="L25">
      <style:paragraph-properties fo:margin-top="0cm" fo:margin-bottom="0.499cm" style:contextual-spacing="false" fo:line-height="114%"/>
      <style:text-properties style:font-name="Liberation Serif"/>
    </style:style>
    <style:style style:name="P40" style:family="paragraph" style:parent-style-name="Text_20_body" style:list-style-name="L26">
      <style:paragraph-properties fo:margin-top="0cm" fo:margin-bottom="0.499cm" style:contextual-spacing="false" fo:line-height="114%"/>
      <style:text-properties style:font-name="Liberation Serif"/>
    </style:style>
    <style:style style:name="P41" style:family="paragraph" style:parent-style-name="Text_20_body" style:list-style-name="L1">
      <style:text-properties style:font-name="Liberation Serif"/>
    </style:style>
    <style:style style:name="P42" style:family="paragraph" style:parent-style-name="Text_20_body">
      <style:text-properties style:font-name="Liberation Serif" officeooo:paragraph-rsid="000beea1"/>
    </style:style>
    <style:style style:name="P43" style:family="paragraph" style:parent-style-name="Text_20_body">
      <style:text-properties style:font-name="Liberation Serif" fo:font-size="14pt" officeooo:paragraph-rsid="000beea1" style:font-size-asian="14pt" style:font-size-complex="14pt"/>
    </style:style>
    <style:style style:name="P44" style:family="paragraph" style:parent-style-name="Text_20_body">
      <style:paragraph-properties fo:text-align="start" style:justify-single-word="false"/>
      <style:text-properties style:font-name="Liberation Serif"/>
    </style:style>
    <style:style style:name="P45" style:family="paragraph" style:parent-style-name="Text_20_body">
      <style:paragraph-properties fo:margin-top="0cm" fo:margin-bottom="0cm" style:contextual-spacing="false"/>
      <style:text-properties style:font-name="Liberation Serif"/>
    </style:style>
    <style:style style:name="P46" style:family="paragraph" style:parent-style-name="Text_20_body" style:list-style-name="L10">
      <style:paragraph-properties fo:margin-top="0cm" fo:margin-bottom="0cm" style:contextual-spacing="false"/>
      <style:text-properties style:font-name="Liberation Serif"/>
    </style:style>
    <style:style style:name="P47" style:family="paragraph" style:parent-style-name="Text_20_body">
      <style:text-properties style:font-name="Liberation Serif" fo:font-weight="normal" officeooo:rsid="000eb384" style:font-weight-asian="normal" style:font-weight-complex="normal"/>
    </style:style>
    <style:style style:name="P48" style:family="paragraph" style:parent-style-name="Text_20_body">
      <style:paragraph-properties fo:margin-top="0cm" fo:margin-bottom="0.499cm" style:contextual-spacing="false" fo:line-height="114%"/>
    </style:style>
    <style:style style:name="P49" style:family="paragraph" style:parent-style-name="Text_20_body" style:list-style-name="L24">
      <style:paragraph-properties fo:margin-top="0cm" fo:margin-bottom="0.499cm" style:contextual-spacing="false" fo:line-height="11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3e268"/>
    </style:style>
    <style:style style:name="T4" style:family="text">
      <style:text-properties fo:font-weight="bold" officeooo:rsid="000c4c1f"/>
    </style:style>
    <style:style style:name="T5" style:family="text">
      <style:text-properties fo:font-style="italic"/>
    </style:style>
    <style:style style:name="T6" style:family="text">
      <style:text-properties style:font-name="Arial" fo:font-size="12pt" fo:font-weight="bold" style:font-name-asian="Arial1" style:font-size-asian="12pt" style:font-weight-asian="bold" style:font-name-complex="Arial1" style:font-size-complex="12pt" style:font-weight-complex="bold"/>
    </style:style>
    <style:style style:name="T7" style:family="text">
      <style:text-properties style:font-name="Arial" fo:font-size="12pt" fo:font-weight="bold" officeooo:rsid="000beea1" style:font-name-asian="Arial1" style:font-size-asian="12pt" style:font-weight-asian="bold" style:font-name-complex="Arial1" style:font-size-complex="12pt" style:font-weight-complex="bold"/>
    </style:style>
    <style:style style:name="T8" style:family="text">
      <style:text-properties style:font-name="Times New Roman" fo:font-size="16pt" fo:font-weight="bold" style:font-size-asian="16pt" style:font-weight-asian="bold" style:font-name-complex="Times New Roman1" style:font-size-complex="16pt"/>
    </style:style>
    <style:style style:name="T9" style:family="text">
      <style:text-properties style:font-name="Times New Roman" fo:font-size="16pt" fo:font-weight="bold" officeooo:rsid="0013e268" style:font-size-asian="16pt" style:font-weight-asian="bold" style:font-name-complex="Times New Roman1" style:font-size-complex="16pt"/>
    </style:style>
    <style:style style:name="T10" style:family="text">
      <style:text-properties style:font-name="Times New Roman" fo:font-size="14pt" fo:font-weight="bold" style:font-name-asian="Times New Roman1" style:font-size-asian="14pt" style:language-asian="tr" style:country-asian="TR" style:font-weight-asian="bold" style:font-name-complex="Times New Roman1" style:font-size-complex="14pt" style:font-weight-complex="bold"/>
    </style:style>
    <style:style style:name="T11" style:family="text">
      <style:text-properties style:font-name="Times New Roman" fo:font-size="14pt" fo:font-weight="normal" style:font-name-asian="Times New Roman1" style:font-size-asian="14pt" style:language-asian="tr" style:country-asian="TR" style:font-weight-asian="normal" style:font-name-complex="Times New Roman1" style:font-size-complex="14pt" style:font-weight-complex="normal"/>
    </style:style>
    <style:style style:name="T12" style:family="text">
      <style:text-properties fo:color="#0070c0" loext:opacity="100%" style:font-name="Times New Roman" fo:font-size="16pt" fo:font-weight="bold" style:font-name-asian="Arial1" style:font-size-asian="16pt" style:font-weight-asian="bold" style:font-name-complex="Times New Roman1" style:font-size-complex="16pt" style:font-weight-complex="bold"/>
    </style:style>
    <style:style style:name="T13" style:family="text">
      <style:text-properties fo:color="#0070c0" loext:opacity="100%" fo:font-size="16pt" fo:font-weight="bold" style:font-name-asian="Arial1" style:font-size-asian="16pt" style:font-weight-asian="bold" style:font-name-complex="Times New Roman1" style:font-size-complex="16pt" style:font-weight-complex="bold"/>
    </style:style>
    <style:style style:name="T14" style:family="text">
      <style:text-properties fo:color="#ff0000" loext:opacity="100%" style:font-name="Times New Roman" fo:font-size="16pt" fo:font-weight="bold" style:font-name-asian="Arial1" style:font-size-asian="16pt" style:font-weight-asian="bold" style:font-name-complex="Times New Roman1" style:font-size-complex="16pt" style:font-weight-complex="bold"/>
    </style:style>
    <style:style style:name="T15" style:family="text">
      <style:text-properties fo:color="#ff0000" loext:opacity="100%" fo:font-size="16pt" fo:font-weight="bold" style:font-name-asian="Arial1" style:font-size-asian="16pt" style:font-weight-asian="bold" style:font-name-complex="Times New Roman1" style:font-size-complex="16pt" style:font-weight-complex="bold"/>
    </style:style>
    <style:style style:name="T16" style:family="text">
      <style:text-properties fo:font-weight="normal" style:font-weight-asian="normal" style:font-weight-complex="normal"/>
    </style:style>
    <style:style style:name="T17" style:family="text">
      <style:text-properties fo:font-size="18pt" fo:font-weight="bold" style:font-size-asian="18pt" style:font-weight-asian="bold" style:font-size-complex="18pt" style:font-weight-complex="bold"/>
    </style:style>
    <style:style style:name="T18" style:family="text">
      <style:text-properties officeooo:rsid="000c4c1f"/>
    </style:style>
    <style:style style:name="T19" style:family="text">
      <style:text-properties fo:font-size="14pt" fo:font-weight="bold" style:font-name-asian="Times New Roman1" style:font-size-asian="14pt" style:language-asian="tr" style:country-asian="TR" style:font-weight-asian="bold" style:font-name-complex="Times New Roman1" style:font-size-complex="14pt" style:font-weight-complex="bold"/>
    </style:style>
    <style:style style:name="T20" style:family="text">
      <style:text-properties fo:font-size="14pt" fo:font-weight="normal" style:font-name-asian="Times New Roman1" style:font-size-asian="14pt" style:language-asian="tr" style:country-asian="TR" style:font-weight-asian="normal" style:font-name-complex="Times New Roman1" style:font-size-complex="14pt" style:font-weight-complex="normal"/>
    </style:style>
    <style:style style:name="T21" style:family="text">
      <style:text-properties fo:font-size="12pt" fo:font-weight="bold" style:font-name-asian="Arial1" style:font-size-asian="12pt" style:font-weight-asian="bold" style:font-name-complex="Arial1" style:font-size-complex="12pt" style:font-weight-complex="bold"/>
    </style:style>
    <style:style style:name="T22" style:family="text">
      <style:text-properties fo:font-size="12pt" fo:font-weight="bold" officeooo:rsid="000beea1" style:font-name-asian="Arial1" style:font-size-asian="12pt" style:font-weight-asian="bold" style:font-name-complex="Arial1" style:font-size-complex="12pt" style:font-weight-complex="bold"/>
    </style:style>
    <style:style style:name="T23" style:family="text">
      <style:text-properties fo:color="#000000" loext:opacity="100%" style:font-name="Times New Roman" fo:font-size="16pt" fo:font-weight="bold" style:letter-kerning="true" style:font-name-asian="Times New Roman1" style:font-size-asian="16pt" style:language-asian="tr" style:country-asian="TR" style:font-weight-asian="bold" style:font-name-complex="Times New Roman1" style:font-size-complex="16pt" style:font-weight-complex="bold"/>
    </style:style>
    <style:style style:name="T24" style:family="text">
      <style:text-properties fo:color="#000000" loext:opacity="100%" fo:font-size="16pt" fo:font-weight="bold" style:letter-kerning="true" style:font-name-asian="Times New Roman1" style:font-size-asian="16pt" style:language-asian="tr" style:country-asian="TR" style:font-weight-asian="bold" style:font-name-complex="Times New Roman1" style:font-size-complex="16pt" style:font-weight-complex="bold"/>
    </style:style>
    <style:style style:name="T25" style:family="text">
      <style:text-properties officeooo:rsid="0013e268"/>
    </style:style>
    <style:style style:name="T26" style:family="text">
      <style:text-properties style:font-name="Google Sans Text"/>
    </style:style>
    <style:style style:name="T27" style:family="text">
      <style:text-properties style:font-name="Google Sans Text" fo:font-weight="bold"/>
    </style:style>
    <style:style style:name="T28" style:family="text">
      <style:text-properties style:font-name="Google Sans Text" fo:font-weight="normal" style:font-weight-asian="normal" style:font-weight-complex="normal"/>
    </style:style>
    <style:style style:name="T29" style:family="text">
      <style:text-properties style:font-name="Liberation Serif"/>
    </style:style>
    <style:style style:name="T30" style:family="text">
      <style:text-properties style:font-name="Liberation Serif" fo:font-weight="bold"/>
    </style:style>
    <style:style style:name="T31" style:family="text">
      <style:text-properties style:font-name="Liberation Serif" fo:font-size="14pt" fo:font-weight="bold" style:font-name-asian="Times New Roman1" style:font-size-asian="14pt" style:language-asian="tr" style:country-asian="TR" style:font-weight-asian="bold" style:font-name-complex="Times New Roman1" style:font-size-complex="14pt" style:font-weight-complex="bold"/>
    </style:style>
    <style:style style:name="T32" style:family="text">
      <style:text-properties style:font-name="Liberation Serif" fo:font-weight="normal" style:font-weight-asian="normal" style:font-weight-complex="normal"/>
    </style:style>
    <style:style style:name="T33" style:family="text">
      <style:text-properties fo:font-size="16pt" fo:font-weight="bold" style:font-size-asian="16pt" style:font-weight-asian="bold" style:font-name-complex="Times New Roman1" style:font-size-complex="16pt"/>
    </style:style>
    <style:style style:name="T34" style:family="text">
      <style:text-properties fo:font-size="16pt" fo:font-weight="bold" officeooo:rsid="0013e268" style:font-size-asian="16pt" style:font-weight-asian="bold" style:font-name-complex="Times New Roman1"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NKARA UNIVERSITY </text:p>
      <text:p text:style-name="P16">FACULTY OF ENGINEERING</text:p>
      <text:p text:style-name="P17">DEPARTMENT OF COMPUTER ENGINEERING</text:p>
      <text:p text:style-name="P18"><draw:frame draw:style-name="fr2" draw:name="image3.png" text:anchor-type="as-char" svg:width="5.001cm" svg:height="5.001cm" draw:z-index="0"><draw:image xlink:href="Pictures/10000000000001B1000001B1EA8010D20DED931E.png" xlink:type="simple" xlink:show="embed" xlink:actuate="onLoad" draw:mime-type="image/png"/></draw:frame></text:p>
      <text:p text:style-name="P17"/>
      <text:p text:style-name="P20">BLM4522 Ağ Tabanlı Paralel Tanıtım Sistemleri</text:p>
      <text:p text:style-name="P19"><text:span text:style-name="T13"><text:line-break/></text:span><text:span text:style-name="T33">Proje </text:span><text:span text:style-name="T34">7</text:span><text:span text:style-name="T33">: <text:s/></text:span><text:span text:style-name="T24">Veritabanı Yedekleme ve Otomasyon Çalışması </text:span><text:span text:style-name="T15"><text:line-break/></text:span></text:p>
      <text:p text:style-name="P18"><text:span text:style-name="T21">T</text:span><text:span text:style-name="T22">uğrul Özgün</text:span><text:span text:style-name="T21"> </text:span></text:p>
      <text:p text:style-name="P18"><text:span text:style-name="T21">2</text:span><text:span text:style-name="T22">2290082</text:span></text:p>
      <text:h text:style-name="P21" text:outline-level="2"/>
      <text:h text:style-name="P22" text:outline-level="2"><text:span text:style-name="T19">Git link: </text:span><text:span text:style-name="T20">https://github.com/Forcipus/Paralel-Sistemler</text:span></text:h>
      <text:h text:style-name="P22" text:outline-level="2"><text:span text:style-name="T19">Video link: </text:span><text:span text:style-name="T20">https://drive.google.com/drive/folders/1aXqYA1RbEGioQ-7k64ovt--p6e0QNuGY?usp=sharing</text:span></text:h>
      <text:h text:style-name="P15" text:outline-level="2"><text:span text:style-name="Internet_20_link"><text:span text:style-name="T31"/></text:span></text:h>
      <text:h text:style-name="P15" text:outline-level="2"><text:soft-page-break/><text:span text:style-name="Internet_20_link"><text:span text:style-name="T31"/></text:span></text:h>
      <text:p text:style-name="P35"><text:span text:style-name="T4">İÇİNDEKİLER</text:span></text:p>
      <text:list xml:id="list2660573837" text:style-name="L22">
        <text:list-item>
          <text:p text:style-name="P33"><text:span text:style-name="T3">G</text:span><text:span text:style-name="T1">İRİŞ VE AMAÇ...................................................................................................................</text:span><text:span text:style-name="T3">2</text:span></text:p>
          <text:list>
            <text:list-header>
              <text:p text:style-name="P33"><text:span text:style-name="T25">1</text:span>.1. Kapsam ve Metodoloji </text:p>
            </text:list-header>
          </text:list>
        </text:list-item>
        <text:list-item>
          <text:p text:style-name="P33"><text:span text:style-name="T3">D</text:span><text:span text:style-name="T1">İNAMİK T-SQL SCRIPTING İLE YEDEKLEME VE RAPORLAMA......................</text:span><text:span text:style-name="T3">3</text:span> </text:p>
          <text:list>
            <text:list-header>
              <text:p text:style-name="P33">2.1. Statik Yedekleme Riskleri ve Zaman Damgası İhtiyacı</text:p>
              <text:p text:style-name="P33">2.2. Dinamik Yedekleme Scriptinin Teknik Altyapısı</text:p>
            </text:list-header>
          </text:list>
        </text:list-item>
        <text:list-item>
          <text:p text:style-name="P33"><text:span text:style-name="T3">S</text:span><text:span text:style-name="T1">QL SERVER AGENT İLE GÖREV OTOMASYONU VE ZAMANLAMA.................</text:span><text:span text:style-name="T3">4</text:span></text:p>
          <text:list>
            <text:list-header>
              <text:p text:style-name="P33"><text:span text:style-name="T25">3</text:span>.1. SQL Server Agent Servisinin Yapılandırılması ve Önemi </text:p>
              <text:p text:style-name="P33"><text:span text:style-name="T25">3</text:span>.2. Zamanlanmış Görevlerin (Job Steps) Kurgulanması </text:p>
              <text:p text:style-name="P34"><text:span text:style-name="T25">3</text:span>.3. İş Yoğunluğuna Uygun Zamanlama (Schedules) Stratejisi </text:p>
            </text:list-header>
          </text:list>
        </text:list-item>
        <text:list-item>
          <text:p text:style-name="P34"><text:span text:style-name="T3">O</text:span><text:span text:style-name="T1">TOMATİK YEDEKLEME UYARILARI VE BİLDİRİM YÖNETİMİ......................</text:span><text:span text:style-name="T3">5</text:span></text:p>
          <text:list>
            <text:list-header>
              <text:p text:style-name="P33"><text:span text:style-name="T25">4</text:span>.1. Database Mail ve Operatör Entegrasyonu Mimarisi</text:p>
              <text:p text:style-name="P33"><text:span text:style-name="T25">4</text:span>.2. Hata Anında Tetiklenen Gerçek Zamanlı Uyarı Mekanizmaları </text:p>
            </text:list-header>
          </text:list>
        </text:list-item>
        <text:list-item>
          <text:p text:style-name="P33"><text:span text:style-name="T1">DENETİM VE SİSTEM SAĞLIĞI SİMÜLASYONU......................................................</text:span><text:span text:style-name="T3">6</text:span></text:p>
          <text:list>
            <text:list-header>
              <text:p text:style-name="P33"><text:span text:style-name="T25">5</text:span>.1. Canlı Hata Testi ile Bildirim Doğrulama (Failover Test)</text:p>
              <text:p text:style-name="P33"><text:span text:style-name="T25">5</text:span>.2. T-SQL ile Geçmiş Görevlerin Durum Raporlaması </text:p>
            </text:list-header>
          </text:list>
        </text:list-item>
        <text:list-item>
          <text:p text:style-name="P33"><text:span text:style-name="T3">S</text:span><text:span text:style-name="T1">ONUÇ...................................................................................................................................</text:span><text:span text:style-name="T3">6</text:span></text:p>
        </text:list-item>
      </text:list>
      <text:p text:style-name="Text_20_body"><text:span text:style-name="Internet_20_link"><text:span text:style-name="T31"/></text:span></text:p>
      <text:h text:style-name="P15" text:outline-level="2"><text:span text:style-name="Internet_20_link"><text:span text:style-name="T31"/></text:span></text:h>
      <text:h text:style-name="P22" text:outline-level="2"/>
      <text:h text:style-name="P15" text:outline-level="2"><text:span text:style-name="Internet_20_link"><text:span text:style-name="T31"/></text:span></text:h>
      <text:h text:style-name="P2" text:outline-level="2"><text:soft-page-break/>1. GİRİŞ VE AMAÇ</text:h>
      <text:p text:style-name="P38"><text:bookmark text:name="p-rc_eaf56c6df4340deb-1022"/>Modern kurumsal bilgi sistemlerinde veritabanları, organizasyonların en kritik ve telafisi olmayan dijital varlıklarını barındırır. Sistem mimarilerinde meydana gelebilecek donanım arızaları, siber saldırılar veya insan odaklı operasyonel kazalar, verilerin kaybolmasına ve telafisi güç mali zararlara yol açabilmektedir. Bu riskleri bertaraf etmek adına vize döneminde kurgulanan manuel yedekleme stratejileri temel bir koruma sağlasa da, operasyonların insan müdahalesine bağımlı olarak yürütülmesi sürdürülebilir bir mühendislik yaklaşımı değildir. Sorumlu bir Veritabanı Yöneticisi (DBA) için nihai hedef, veri güvenliğini insan hatasından tamamen arındırarak kendi kendine çalışan ve sistem sağlığını raporlayan otomatize koruma kalkanları inşa etmektir. </text:p>
      <text:p text:style-name="P48"><text:bookmark text:name="p-rc_eaf56c6df4340deb-1023"/><text:span text:style-name="T29">Bu projenin temel amacı, Microsoft SQL Server ortamında kurumsal veri setlerini barındıran </text:span><text:span text:style-name="Source_20_Text"><text:span text:style-name="T29">WideWorldImporters</text:span></text:span><text:span text:style-name="T29"> veritabanı üzerinde, tamamen otomatik olarak çalışan bir yedekleme ve denetim otomasyonu tasarlamaktır. Proje kapsamında, arka planda zamanlanmış görevleri yürütecek altyapı kurulacak, her yedeğin üzerine yazılmasını engelleyen dinamik tarih damgalı T-SQL scriptleri geliştirilecek ve olası arıza durumlarında sistem yöneticisini gerçek zamanlı olarak haberdar edecek kurumsal e-posta bildirim mekanizmaları entegre edilecektir.</text:span></text:p>
      <text:h text:style-name="P6" text:outline-level="3">1.1. Kapsam ve Metodoloji<draw:frame draw:style-name="fr1" draw:name="Image1" text:anchor-type="char" svg:x="8.65cm" svg:y="0.667cm" svg:width="9.701cm" svg:height="9.026cm" draw:z-index="1"><draw:image xlink:href="Pictures/10000001000003D10000038D8DD2BE5093A7745F.png" xlink:type="simple" xlink:show="embed" xlink:actuate="onLoad" draw:mime-type="image/png"/></draw:frame></text:h>
      <text:p text:style-name="P37">Proje süresince aşağıdaki temel veritabanı yönetim süreçleri gerçekleştirilmiştir:</text:p>
      <text:list text:style-name="L1">
        <text:list-item>
          <text:p text:style-name="P41"><text:bookmark text:name="p-rc_eaf56c6df4340deb-1024"/><text:span text:style-name="T1">Dinamik Yedekleme Yapısı:</text:span> Klasik yedekleme işlemlerinin aksine, dosya isimlerinin sonuna anlık zaman verilerini gömen ve disk yönetimini kolaylaştıran dinamik script altyapısı kurgulanmıştır. </text:p>
        </text:list-item>
        <text:list-item text:style-override="L24">
          <text:p text:style-name="P49"><text:bookmark text:name="p-rc_eaf56c6df4340deb-1025"/><text:span text:style-name="T30">Görev Otomasyonu (Job Management):</text:span><text:span text:style-name="T29"> </text:span><text:span text:style-name="Source_20_Text"><text:span text:style-name="T29">SQL Server Agent</text:span></text:span><text:span text:style-name="T29"> motoru aktif edilerek, insan müdahalesi gerektirmeden, sunucu yükünün en az olduğu zaman dilimlerinde periyodik çalışan iş parçacıkları zamanlanmıştır. </text:span></text:p>
        </text:list-item>
        <text:list-item text:style-override="L25">
          <text:p text:style-name="P39"><text:bookmark text:name="p-rc_eaf56c6df4340deb-1026"/><text:span text:style-name="T1">Database Mail ve Bildirim Yönetimi:</text:span> Sistemde bir uyarı operatörü tanımlanmış ve yedekleme süreçlerinde oluşabilecek aksaklıkların (disk doluluğu, erişim yetkisi kaybı vb.) anında e-posta ile raporlanması sağlanmıştır. </text:p>
        </text:list-item>
        <text:list-item text:style-override="L26">
          <text:p text:style-name="P40"><text:bookmark text:name="p-rc_eaf56c6df4340deb-1027"/><text:span text:style-name="T1">Canlı Felaket Simülasyonu:</text:span> Kurulan otomasyonun doğruluğunu kanıtlamak adına kontrollü hata senaryoları üretilmiş ve sistemin refleksleri canlı olarak doğrulanmıştır. </text:p>
        </text:list-item>
      </text:list>
      <text:h text:style-name="P3" text:outline-level="2"><text:soft-page-break/><text:span text:style-name="T17">2. </text:span>DİNAMİK T-SQL SCRIPTING İLE YEDEKLEME VE RAPORLAMA </text:h>
      <text:p text:style-name="P42"><text:bookmark text:name="p-rc_23178fdc4a1c692f-195"/>Veri bütünlüğünü korumak ve olası bir felaket anında veri kaybını sıfıra indirmek amacıyla<text:span text:style-name="T16"> Full (Tam), Differential (Fark) ve Transaction Log (Artık/Günlük) </text:span>yedekleme türlerini kapsayan bir strateji izlenmiştir. Bu üçlü yapı, hem depolama alanından tasarruf etmeyi hem de veritabanını belirli bir zaman dilimine (Point-in-Time) döndürebilmeyi sağlar.</text:p>
      <text:p text:style-name="P43"><text:span text:style-name="T2">2.1. Statik Yedekleme Riskleri ve Zaman Damgası İhtiyacı </text:span></text:p>
      <text:p text:style-name="P44">Veritabanı yedekleme süreçlerinde sabit veya statik dosya isimleri kullanılması, her yeni yedek alındığında bir önceki kritik verinin üzerine yazılmasına (overwrite) neden olarak veri kurtarma esnekliğini yok eder. Bu bölümde, geçmişe dönük şeffaf bir yedekleme geçmişi raporu oluşturabilmek adına, dosya isimlerini o anın saniyesiyle damgalayan dinamik T-SQL script yapısı kurgulanmıştır. </text:p>
      <text:p text:style-name="P23"/>
      <text:p text:style-name="P23"/>
      <text:h text:style-name="P7" text:outline-level="3">2.2. Dinamik Yedekleme Scriptinin Teknik Altyapısı </text:h>
      <text:p text:style-name="P37">Yedeklerin disk üzerinde kontrolsüz büyümesini engellemek ve her yedeğin benzersiz bir dosya adı almasını sağlamak amacıyla geliştirilen kurumsal T-SQL altyapısı şu şekildedir: </text:p>
      <text:p text:style-name="P24">SQL<draw:frame draw:style-name="fr1" draw:name="Image3" text:anchor-type="char" svg:x="6.121cm" svg:y="-0.092cm" svg:width="11.816cm" svg:height="8.608cm" draw:z-index="3"><draw:image xlink:href="Pictures/10000001000004E10000038E7846D9503AA91E00.png" xlink:type="simple" xlink:show="embed" xlink:actuate="onLoad" draw:mime-type="image/png"/></draw:frame></text:p>
      <text:p text:style-name="Preformatted_20_Text"><text:span text:style-name="Source_20_Text"><text:span text:style-name="T29">USE WideWorldImporters;</text:span></text:span></text:p>
      <text:p text:style-name="Preformatted_20_Text"><text:span text:style-name="Source_20_Text"><text:span text:style-name="T29">GO</text:span></text:span></text:p>
      <text:p text:style-name="P14"/>
      <text:p text:style-name="Preformatted_20_Text"><text:span text:style-name="Source_20_Text"><text:span text:style-name="T29">-- PROJE 7: OTOMATİK DİNAMİK YEDEKLEME SCRIPT'I</text:span></text:span></text:p>
      <text:p text:style-name="Preformatted_20_Text"><text:span text:style-name="Source_20_Text"><text:span text:style-name="T29">DECLARE @DBName NVARCHAR(100) = 'WideWorldImporters'</text:span></text:span></text:p>
      <text:p text:style-name="Preformatted_20_Text"><text:span text:style-name="Source_20_Text"><text:span text:style-name="T29">DECLARE @BackupFolder NVARCHAR(500) = 'C:\SQL_Yedekler\' -- Dizinin önceden oluşturulması gerekir</text:span></text:span></text:p>
      <text:p text:style-name="Preformatted_20_Text"><text:span text:style-name="Source_20_Text"><text:span text:style-name="T29">DECLARE @FileName NVARCHAR(500)</text:span></text:span></text:p>
      <text:p text:style-name="Preformatted_20_Text"><text:span text:style-name="Source_20_Text"><text:span text:style-name="T29">DECLARE @DateStamp NVARCHAR(20)</text:span></text:span></text:p>
      <text:p text:style-name="P14"/>
      <text:p text:style-name="Preformatted_20_Text"><text:span text:style-name="Source_20_Text"><text:span text:style-name="T29">-- O anki tarih ve saati YYYYMMDD_HHMMSS formatına getiriyoruz</text:span></text:span></text:p>
      <text:p text:style-name="Preformatted_20_Text"><text:span text:style-name="Source_20_Text"><text:span text:style-name="T29">SELECT @DateStamp = CONVERT(NVARCHAR(8), GETDATE(), 112) + '_' + </text:span></text:span></text:p>
      <text:p text:style-name="Preformatted_20_Text"><text:span text:style-name="Source_20_Text"><text:span text:style-name="T29"><text:s text:c="20"/>REPLACE(CONVERT(NVARCHAR(8), GETDATE(), 108), ':', '')</text:span></text:span></text:p>
      <text:p text:style-name="P14"/>
      <text:p text:style-name="Preformatted_20_Text"><text:span text:style-name="Source_20_Text"><text:span text:style-name="T29">-- Tam fiziksel dosya yolunun birleştirilmesi</text:span></text:span></text:p>
      <text:p text:style-name="Preformatted_20_Text"><text:span text:style-name="Source_20_Text"><text:span text:style-name="T29">SET @FileName = @BackupFolder + @DBName + '_' + @DateStamp + '.bak'</text:span></text:span></text:p>
      <text:p text:style-name="P14"/>
      <text:p text:style-name="Preformatted_20_Text"><text:span text:style-name="Source_20_Text"><text:span text:style-name="T29">-- Yedekleme emrinin kurumsal parametrelerle tetiklenmesi</text:span></text:span></text:p>
      <text:p text:style-name="Preformatted_20_Text"><text:span text:style-name="Source_20_Text"><text:span text:style-name="T29">BACKUP DATABASE @DBName</text:span></text:span></text:p>
      <text:p text:style-name="Preformatted_20_Text"><text:span text:style-name="Source_20_Text"><text:span text:style-name="T29">TO DISK = @FileName</text:span></text:span></text:p>
      <text:p text:style-name="Preformatted_20_Text"><text:span text:style-name="Source_20_Text"><text:span text:style-name="T29">WITH FORMAT, </text:span></text:span></text:p>
      <text:p text:style-name="Preformatted_20_Text"><text:span text:style-name="Source_20_Text"><text:span text:style-name="T29"><text:s text:c="5"/>INIT, </text:span></text:span></text:p>
      <text:p text:style-name="Preformatted_20_Text"><text:soft-page-break/><text:span text:style-name="Source_20_Text"><text:span text:style-name="T29"><text:s text:c="5"/>NAME = 'Automated Full Backup of ' + @DBName,</text:span></text:span></text:p>
      <text:p text:style-name="Preformatted_20_Text"><text:span text:style-name="Source_20_Text"><text:span text:style-name="T29"><text:s text:c="5"/>STATS = 10; -- İlerleme durumunu her %10'da bir loglar</text:span></text:span></text:p>
      <text:p text:style-name="P13"><text:span text:style-name="Source_20_Text"><text:span text:style-name="T29">GO</text:span></text:span></text:p>
      <text:h text:style-name="P3" text:outline-level="2"><text:span text:style-name="T17">3. </text:span>SQL SERVER AGENT İLE GÖREV OTOMASYONU VE ZAMANLAMA </text:h>
      <text:p text:style-name="P37">Veritabanı yönetiminde yedekleme işlemlerinin manuel olarak yapılması, insan hatasına açık ve sürdürülebilir olmayan bir yöntemdir. Bu nedenle, iş sürekliliğini sağlamak adına yedekleme süreçleri otomatize edilmiştir.</text:p>
      <text:h text:style-name="P7" text:outline-level="3"><text:span text:style-name="T17">3.1. SQL Server Agent</text:span><draw:frame draw:style-name="fr1" draw:name="Image2" text:anchor-type="char" svg:x="7.359cm" svg:y="-0.259cm" svg:width="11.111cm" svg:height="8.147cm" draw:z-index="2"><draw:image xlink:href="Pictures/10000001000004D50000038B87DFD256DC329C06.png" xlink:type="simple" xlink:show="embed" xlink:actuate="onLoad" draw:mime-type="image/png"/></draw:frame><text:span text:style-name="T17"> Servisinin Yapılandırılması ve Önemi </text:span></text:h>
      <text:p text:style-name="Text_20_body"><text:span text:style-name="T29">Zamanlanmış görevlerin ve arka plan scriptlerinin insan müdahalesi olmadan çalışabilmesi, ilişkisel veritabanı motorunun zamanlayıcı servisine bağlıdır. Bu bölümde, otomasyon mimarisinin ana motoru olan </text:span><text:span text:style-name="Source_20_Text"><text:span text:style-name="T29">SQL Server Agent</text:span></text:span><text:span text:style-name="T29"> Windows servisinin aktif edilme süreçleri ve sistemdeki ön koşul rolü ele alınmıştır. </text:span></text:p>
      <text:h text:style-name="P7" text:outline-level="3"><text:span text:style-name="T17">3.2. Zamanlanmış Görevlerin (Job </text:span><draw:frame draw:style-name="fr1" draw:name="Image4" text:anchor-type="char" svg:x="7.355cm" svg:y="1.649cm" svg:width="11.04cm" svg:height="8.319cm" draw:z-index="4"><draw:image xlink:href="Pictures/10000001000004B10000038939308409BEF58A4F.png" xlink:type="simple" xlink:show="embed" xlink:actuate="onLoad" draw:mime-type="image/png"/></draw:frame><text:span text:style-name="T17">Steps) Kurgulanması </text:span></text:h>
      <text:p text:style-name="P26"><text:span text:style-name="T29">SQL Server Agent üzerinde </text:span><text:span text:style-name="Source_20_Text"><text:span text:style-name="T29">Haftalik_Otomatik_Yedekleme</text:span></text:span><text:span text:style-name="T29"> adıyla yeni bir görev (Job) birimi tanımlanmıştır. Bu görevin adımlar (Steps) sekmesine, bir önceki bölümde hazırlanan ve doğrudan veritabanı motoruna emir gönderen dinamik T-SQL scripti entegre edilmiştir. Tür olarak </text:span><text:span text:style-name="Source_20_Text"><text:span text:style-name="T29">Transact-SQL script (T-SQL)</text:span></text:span><text:span text:style-name="T29"> seçilerek kodun doğrudan hedef DB üzerinde execute edilmesi garanti altına alınmıştır. </text:span></text:p>
      <text:p text:style-name="P25">SQL</text:p>
      <text:p text:style-name="Preformatted_20_Text"><text:span text:style-name="Source_20_Text"><text:span text:style-name="T29">-- SQL Agent Job Step içerisine gömülen komut yapısı</text:span></text:span></text:p>
      <text:p text:style-name="Preformatted_20_Text"><text:span text:style-name="Source_20_Text"><text:span text:style-name="T29">BACKUP DATABASE [WideWorldImporters]</text:span></text:span></text:p>
      <text:p text:style-name="Preformatted_20_Text"><text:span text:style-name="Source_20_Text"><text:span text:style-name="T29">TO DISK = N'C:\Backups\WWI_Auto.bak'</text:span></text:span></text:p>
      <text:p text:style-name="P13"><text:span text:style-name="Source_20_Text"><text:span text:style-name="T29">WITH NO_COMPRESSION, FORMAT, INIT;</text:span></text:span></text:p>
      <text:p text:style-name="P36"><text:soft-page-break/></text:p>
      <text:h text:style-name="P7" text:outline-level="3"><text:span text:style-name="T17">3.3. İş Yoğunluğuna Uygun Zamanlama (Schedules) Stratejisi </text:span></text:h>
      <text:p text:style-name="P48"><text:span text:style-name="T29">Oluşturulan otomatik yedekleme işinin hangi periyotlarla çalışacağı </text:span><text:span text:style-name="Source_20_Text"><text:span text:style-name="T29">Schedules</text:span></text:span><text:span text:style-name="T29"> sekmesinde yapılandırılmıştır. Şirketin operasyonel iş ve ağ yoğunluğunun en düşük olduğu, sunucu kaynaklarının boşa çıktığı </text:span><text:span text:style-name="T32">Her Gün Gece Saat 03:00</text:span><text:span text:style-name="T29"> kalıcı zamanlama olarak atanmıştır. Bu strateji, olası bir sistem çökmesi veya felaket anında kaybedilecek maksimum veri miktarını (RPO) güvenli bir zaman dilimi ile sınırlandırarak iş sürekliliğine hizmet eder. </text:span></text:p>
      <text:h text:style-name="P4" text:outline-level="2"><text:span text:style-name="T18">4</text:span>. OTOMATİK YEDEKLEME UYARILARI VE BİLDİRİM YÖNETİMİ </text:h>
      <text:p text:style-name="P45"><text:bookmark text:name="p-rc_1dc4621a6e1e9524-326"/>Veritabanı yönetiminde en kritik aşama, beklenmedik veri kayıpları veya hatalı operasyonlar sonrası sistemin en az veri kaybıyla ayağa kaldırılmasıdır. Bu bölümde, bir tablonun tamamen silindiği bir "felaket" senaryosu ve bu durumdan<text:span text:style-name="T16"> Point-in-Time Restore</text:span> (Zamanda Belirli Bir Ana Dönme) tekniği ile kurtulma süreci ele alınmıştır.</text:p>
      <text:h text:style-name="P6" text:outline-level="3"><text:span text:style-name="T18">4</text:span>.1. Database Mail ve Operatör Entegr<draw:frame draw:style-name="fr1" draw:name="Image5" text:anchor-type="char" svg:x="8.167cm" svg:y="0.085cm" svg:width="9.603cm" svg:height="7.147cm" draw:z-index="5"><draw:image xlink:href="Pictures/10000001000004C50000038DF913F0A983F64A67.png" xlink:type="simple" xlink:show="embed" xlink:actuate="onLoad" draw:mime-type="image/png"/></draw:frame>asyonu Mimarisi </text:h>
      <text:p text:style-name="Text_20_body"><text:span text:style-name="T29">Otomasyon süreçlerinin takibinde her gün başarılı logları manuel incelemek verimsiz bir yöntem olduğundan, sistemin sadece istisnai kriz anlarında ses vermesi gerekir. Bu bölümde, SQL Server'ın dış dünyaya e-posta gönderebilmesini sağlayan </text:span><text:span text:style-name="Source_20_Text"><text:span text:style-name="T29">Database Mail</text:span></text:span><text:span text:style-name="T29"> altyapısı ve uyarıların ulaştırılacağı kurumsal "Sistem Yöneticisi" operatörünün tanımlanma adımları işlenmiştir. </text:span></text:p>
      <text:list text:style-name="L10">
        <text:list-header>
          <text:p text:style-name="P46"/>
        </text:list-header>
      </text:list>
      <text:h text:style-name="P6" text:outline-level="3"><text:span text:style-name="T18">4</text:span>.2. Hata Anında Tetiklenen Gerçek Z<draw:frame draw:style-name="fr1" draw:name="Image6" text:anchor-type="char" svg:x="8.1cm" svg:y="0.332cm" svg:width="9.633cm" svg:height="7.491cm" draw:z-index="6"><draw:image xlink:href="Pictures/10000001000004910000038D4E81F199B63D41C3.png" xlink:type="simple" xlink:show="embed" xlink:actuate="onLoad" draw:mime-type="image/png"/></draw:frame>amanlı Uyarı Mekanizmaları </text:h>
      <text:p text:style-name="Text_20_body"><text:span text:style-name="T29">Yedekleme görevinin (Job) özellikler panelinde yer alan </text:span><text:span text:style-name="Source_20_Text"><text:span text:style-name="T29">Notifications</text:span></text:span><text:span text:style-name="T29"> (Bildirimler) katmanı aktif edilmiştir. Bu alanda </text:span><text:span text:style-name="T32">E-mail -&gt; Sistem_Yöneticisi -&gt; When the job fails (İş başarısız olduğunda) </text:span><text:span text:style-name="T29">koşulu seçilerek ilişkilendirme tamamlanmıştır. Bu sayede, sistem normal günlerde sessizce görevini yürütecek; ancak disk doluluğu, klasör silinmesi veya yetki kayıpları gibi bir arıza meydana geldiği saniyede yöneticiye acil durum bildirim raporu gönderecektir. </text:span></text:p>
      <text:h text:style-name="P4" text:outline-level="2"><text:soft-page-break/><text:span text:style-name="T18">5</text:span>. DENETİM VE SİSTEM SAĞLIĞI SİMÜLASYONU </text:h>
      <text:p text:style-name="P45"/>
      <text:h text:style-name="P6" text:outline-level="3" text:is-list-header="true"><text:span text:style-name="T18">5</text:span>.1. Canlı Hata Testi ile Bildirim Doğrulama (Failover Test) </text:h>
      <text:p text:style-name="Text_20_body"><text:span text:style-name="T29">Kurulan e-posta bildirim ve otomasyon mekanizmasının kararlılığını test etmek amacıyla veritabanı üzerinde canlı bir arıza simüle edilmiştir. T-SQL kodundaki yedekleme klasör yolu, bilgisayarda var olmayan geçersiz bir dizinle (</text:span><text:span text:style-name="Source_20_Text"><text:span text:style-name="T29">X:\Olmayan_Klasor\</text:span></text:span><text:span text:style-name="T29">) değiştirilmiştir. Görev manuel olarak tetiklendiğinde sistem anında kırmızı ekranla </text:span><text:span text:style-name="Source_20_Text"><text:span text:style-name="T29">Failed</text:span></text:span><text:span text:style-name="T29"> durumuna geçmiş, </text:span><text:span text:style-name="Source_20_Text"><text:span text:style-name="T29">Job History</text:span></text:span><text:span text:style-name="T29"> günlüklerine arıza detaylıca işlenmiş ve arka planda operatör mail adresine acil durum uyarı bildirimi başarıyla ulaştırılmıştır. </text:span></text:p>
      <text:h text:style-name="P6" text:outline-level="3" text:is-list-header="true"><text:span text:style-name="T18">5</text:span>.2. T-SQL ile Geçmiş Görevlerin Durum Raporlaması </text:h>
      <text:p text:style-name="Text_20_body"><text:span text:style-name="T29">Sistem yöneticilerinin geçmişe dönük hangi yedeklerin hangi tarihte başarıyla diske yazıldığını şeffaf bir şekilde denetleyebilmesi amacıyla, </text:span><text:span text:style-name="Source_20_Text"><text:span text:style-name="T29">msdb</text:span></text:span><text:span text:style-name="T29"> sistem tablolarını sorgulayan aşağıdaki kurumsal T-SQL raporlama betiği hazırlanmıştır: </text:span></text:p>
      <text:p text:style-name="P24">SQL</text:p>
      <text:p text:style-name="Preformatted_20_Text"><text:span text:style-name="Source_20_Text"><text:span text:style-name="T29">-- SON ALINAN YEDEKLERİN DURUMUNU LİSTELEYEN DENETİM SORGUSU</text:span></text:span></text:p>
      <text:p text:style-name="Preformatted_20_Text"><text:span text:style-name="Source_20_Text"><text:span text:style-name="T29">SELECT </text:span></text:span></text:p>
      <text:p text:style-name="Preformatted_20_Text"><text:span text:style-name="Source_20_Text"><text:span text:style-name="T29"><text:s text:c="4"/>bks.database_name AS [Veritabanı Adı],</text:span></text:span></text:p>
      <text:p text:style-name="Preformatted_20_Text"><text:span text:style-name="Source_20_Text"><text:span text:style-name="T29"><text:s text:c="4"/>bks.backup_start_date AS [Yedekleme Başlangıcı],</text:span></text:span></text:p>
      <text:p text:style-name="Preformatted_20_Text"><text:span text:style-name="Source_20_Text"><text:span text:style-name="T29"><text:s text:c="4"/>bks.backup_finish_date AS [Yedekleme Bitişi],</text:span></text:span></text:p>
      <text:p text:style-name="Preformatted_20_Text"><text:span text:style-name="Source_20_Text"><text:span text:style-name="T29"><text:s text:c="4"/>CASE bks.type </text:span></text:span></text:p>
      <text:p text:style-name="Preformatted_20_Text"><text:span text:style-name="Source_20_Text"><text:span text:style-name="T29"><text:s text:c="8"/>WHEN 'D' THEN 'Tam (Full) Yedek'</text:span></text:span></text:p>
      <text:p text:style-name="Preformatted_20_Text"><text:span text:style-name="Source_20_Text"><text:span text:style-name="T29"><text:s text:c="8"/>WHEN 'I' THEN 'Fark (Differential) Yedek'</text:span></text:span></text:p>
      <text:p text:style-name="Preformatted_20_Text"><text:span text:style-name="Source_20_Text"><text:span text:style-name="T29"><text:s text:c="8"/>WHEN 'L' THEN 'Log Yedeği'</text:span></text:span></text:p>
      <text:p text:style-name="Preformatted_20_Text"><text:span text:style-name="Source_20_Text"><text:span text:style-name="T29"><text:s text:c="4"/>END AS [Yedek Türü],</text:span></text:span></text:p>
      <text:p text:style-name="Preformatted_20_Text"><text:span text:style-name="Source_20_Text"><text:span text:style-name="T29"><text:s text:c="4"/>bkmf.physical_device_name AS [Yedeğin Kaydedildiği Yer]</text:span></text:span></text:p>
      <text:p text:style-name="Preformatted_20_Text"><text:span text:style-name="Source_20_Text"><text:span text:style-name="T29">FROM msdb.dbo.backupset bks</text:span></text:span></text:p>
      <text:p text:style-name="Preformatted_20_Text"><text:span text:style-name="Source_20_Text"><text:span text:style-name="T29">INNER JOIN msdb.dbo.backupmediafamily bkmf </text:span></text:span></text:p>
      <text:p text:style-name="Preformatted_20_Text"><text:span text:style-name="Source_20_Text"><text:span text:style-name="T29"><text:s text:c="4"/>ON bks.media_set_id = bkmf.media_set_id</text:span></text:span></text:p>
      <text:p text:style-name="Preformatted_20_Text"><text:span text:style-name="Source_20_Text"><text:span text:style-name="T29">ORDER BY bks.backup_finish_date DESC;</text:span></text:span></text:p>
      <text:p text:style-name="P13"><text:span text:style-name="Source_20_Text"><text:span text:style-name="T29">GO</text:span></text:span></text:p>
      <text:p text:style-name="P38">Sorgu çalıştırıldığında, otomasyon tarafından başarıyla üretilen tarih damgalı yedek dosyalarının boyutu ve konumu liste halinde raporlanarak sistem sağlığı tescillenmiştir. </text:p>
      <text:h text:style-name="P5" text:outline-level="2"><text:span text:style-name="T18">6</text:span>. SONUÇ</text:h>
      <text:p text:style-name="P47"><text:bookmark text:name="p-rc_eaf56c6df4340deb-1036"/>Proje 7 çalışması kapsamında, kurumsal standartlara tam uyumlu bir Veritabanı Yedekleme ve Otomasyon sistemi başarıyla kurgulanmıştır. </text:p>
      <text:p text:style-name="P38"><text:bookmark text:name="p-rc_eaf56c6df4340deb-1037"/>Proje boyunca elde edilen çıktılar, modern sistem yönetiminde insan faktörünün operasyonlardan arındırılmasının iş sürekliliği açısından ne kadar hayati olduğunu ortaya koymuştur. Geliştirilen dinamik zaman damgalı T-SQL scriptleri, SQL Server Agent zamanlayıcı mimarisi ve Database Mail uyarı entegrasyonu sayesinde; veritabanı altyapısı kesintisiz, kendi kendini denetleyebilen ve olası felaket anlarında yönetim katmanını anlık olarak uyaran profesyonel bir koruma kalkanına kavuşturulmuştu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08T15:13:24.229000000</dc:date>
    <meta:editing-duration>PT2H20M18S</meta:editing-duration>
    <meta:editing-cycles>8</meta:editing-cycles>
    <meta:generator>LibreOffice/7.4.1.2$Windows_X86_64 LibreOffice_project/3c58a8f3a960df8bc8fd77b461821e42c061c5f0</meta:generator>
    <meta:document-statistic meta:table-count="0" meta:image-count="7" meta:object-count="0" meta:page-count="7" meta:paragraph-count="109" meta:word-count="1311" meta:character-count="10948" meta:non-whitespace-character-count="9630"/>
  </office:meta>
</office:document-meta>
</file>