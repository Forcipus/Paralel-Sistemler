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1000001B1EA8010D20DED931E.png" manifest:media-type="image/png"/>
  <manifest:file-entry manifest:full-path="Pictures/1000000100000467000003ADE220A3F3889D891C.png" manifest:media-type="image/png"/>
  <manifest:file-entry manifest:full-path="Pictures/1000000100000549000003AFAF9B718937A82F58.png" manifest:media-type="image/png"/>
  <manifest:file-entry manifest:full-path="Pictures/1000000100000609000003B17D1A11057ECA02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fo:font-weight="bold" officeooo:rsid="000eb384" officeooo:paragraph-rsid="000beea1" style:font-weight-asian="bold" style:font-weight-complex="bold"/>
    </style:style>
    <style:style style:name="P2" style:family="paragraph" style:parent-style-name="Text_20_body">
      <style:text-properties officeooo:paragraph-rsid="000beea1"/>
    </style:style>
    <style:style style:name="P3" style:family="paragraph" style:parent-style-name="Heading_20_2">
      <style:text-properties officeooo:paragraph-rsid="000beea1"/>
    </style:style>
    <style:style style:name="P4" style:family="paragraph" style:parent-style-name="Standard">
      <style:paragraph-properties fo:margin-top="0cm" fo:margin-bottom="0.635cm" style:contextual-spacing="false" fo:line-height="150%" fo:text-align="center" style:justify-single-word="false"/>
      <style:text-properties officeooo:paragraph-rsid="000beea1"/>
    </style:style>
    <style:style style:name="P5" style:family="paragraph" style:parent-style-name="Standard">
      <style:paragraph-properties fo:margin-top="0cm" fo:margin-bottom="0.635cm" style:contextual-spacing="false" fo:line-height="150%" fo:text-align="center" style:justify-single-word="false"/>
      <style:text-properties officeooo:paragraph-rsid="0015005b"/>
    </style:style>
    <style:style style:name="P6" style:family="paragraph" style:parent-style-name="Standard">
      <style:paragraph-properties fo:margin-top="0cm" fo:margin-bottom="0.635cm" style:contextual-spacing="false" fo:line-height="150%" fo:text-align="center" style:justify-single-word="false"/>
      <style:text-properties style:font-name="Arial" fo:font-size="14pt" fo:font-weight="bold" officeooo:paragraph-rsid="000beea1" style:font-name-asian="Arial1" style:font-size-asian="14pt" style:font-weight-asian="bold" style:font-name-complex="Arial1" style:font-size-complex="14pt" style:font-weight-complex="bold"/>
    </style:style>
    <style:style style:name="P7" style:family="paragraph" style:parent-style-name="Standard">
      <style:paragraph-properties fo:margin-top="0cm" fo:margin-bottom="0cm" style:contextual-spacing="false" fo:line-height="150%" fo:text-align="center" style:justify-single-word="false"/>
      <style:text-properties style:font-name="Arial" fo:font-size="14pt" fo:font-weight="bold" officeooo:paragraph-rsid="000beea1" style:font-name-asian="Arial1" style:font-size-asian="14pt" style:font-weight-asian="bold" style:font-name-complex="Arial1" style:font-size-complex="14pt" style:font-weight-complex="bold"/>
    </style:style>
    <style:style style:name="P8" style:family="paragraph" style:parent-style-name="Text_20_body">
      <style:paragraph-properties fo:margin-top="0cm" fo:margin-bottom="0cm" style:contextual-spacing="false"/>
    </style:style>
    <style:style style:name="P9" style:family="paragraph" style:parent-style-name="Heading_20_2">
      <style:text-properties fo:font-size="18pt" fo:font-weight="bold" officeooo:paragraph-rsid="000beea1" style:font-size-asian="18pt" style:font-weight-asian="bold" style:font-size-complex="18pt" style:font-weight-complex="bold"/>
    </style:style>
    <style:style style:name="P10" style:family="paragraph" style:parent-style-name="Text_20_body">
      <style:text-properties fo:font-size="18pt" fo:font-weight="bold" officeooo:paragraph-rsid="000beea1" style:font-size-asian="18pt" style:font-weight-asian="bold" style:font-size-complex="18pt" style:font-weight-complex="bold"/>
    </style:style>
    <style:style style:name="P11" style:family="paragraph" style:parent-style-name="Preformatted_20_Text">
      <style:paragraph-properties fo:margin-top="0cm" fo:margin-bottom="0.499cm" style:contextual-spacing="false"/>
    </style:style>
    <style:style style:name="P12" style:family="paragraph" style:parent-style-name="Standard">
      <style:paragraph-properties fo:margin-top="0cm" fo:margin-bottom="0.499cm" style:contextual-spacing="false"/>
    </style:style>
    <style:style style:name="P13" style:family="paragraph" style:parent-style-name="Standard">
      <style:paragraph-properties fo:margin-top="0cm" fo:margin-bottom="0.635cm" style:contextual-spacing="false" fo:line-height="150%" fo:text-align="center" style:justify-single-word="false"/>
      <style:text-properties style:font-name="Times New Roman" fo:font-size="16pt" fo:font-weight="bold" officeooo:paragraph-rsid="000beea1" style:font-size-asian="16pt" style:font-weight-asian="bold" style:font-name-complex="Times New Roman1" style:font-size-complex="16pt"/>
    </style:style>
    <style:style style:name="P14" style:family="paragraph" style:parent-style-name="Text_20_body">
      <style:text-properties fo:font-size="14pt" fo:font-weight="bold" officeooo:paragraph-rsid="000beea1" style:font-size-asian="14pt" style:font-weight-asian="bold" style:font-size-complex="14pt" style:font-weight-complex="bold"/>
    </style:style>
    <style:style style:name="P15" style:family="paragraph" style:parent-style-name="Text_20_body">
      <style:text-properties fo:font-size="14pt" fo:font-weight="bold" officeooo:paragraph-rsid="0015005b" style:font-size-asian="14pt" style:font-weight-asian="bold" style:font-size-complex="14pt" style:font-weight-complex="bold"/>
    </style:style>
    <style:style style:name="P16" style:family="paragraph" style:parent-style-name="Text_20_body">
      <style:text-properties fo:font-size="14pt" fo:font-weight="bold" officeooo:rsid="000c4c1f" officeooo:paragraph-rsid="000c4c1f" style:font-size-asian="14pt" style:font-size-complex="14pt"/>
    </style:style>
    <style:style style:name="P17" style:family="paragraph" style:parent-style-name="Text_20_body">
      <style:text-properties fo:font-size="12pt" fo:font-weight="normal" officeooo:paragraph-rsid="000beea1" style:font-size-asian="12pt" style:font-weight-asian="normal" style:font-size-complex="12pt" style:font-weight-complex="normal"/>
    </style:style>
    <style:style style:name="P18" style:family="paragraph" style:parent-style-name="Text_20_body">
      <style:paragraph-properties fo:margin-top="0cm" fo:margin-bottom="0.499cm" style:contextual-spacing="false" fo:line-height="114%"/>
      <style:text-properties fo:font-size="12pt" fo:font-weight="normal" style:font-size-asian="12pt" style:font-weight-asian="normal" style:font-size-complex="12pt" style:font-weight-complex="normal"/>
    </style:style>
    <style:style style:name="P19" style:family="paragraph" style:parent-style-name="Text_20_body">
      <style:text-properties officeooo:paragraph-rsid="0015005b"/>
    </style:style>
    <style:style style:name="P20" style:family="paragraph" style:parent-style-name="Standard" style:list-style-name="">
      <style:paragraph-properties fo:margin-top="0.494cm" fo:margin-bottom="0.494cm" style:contextual-spacing="false" fo:line-height="100%"/>
      <style:text-properties style:font-name="Times New Roman" fo:font-size="18pt" fo:font-weight="bold" officeooo:paragraph-rsid="000beea1" style:font-name-asian="Times New Roman1" style:font-size-asian="18pt" style:language-asian="tr" style:country-asian="TR" style:font-weight-asian="bold" style:font-name-complex="Times New Roman1" style:font-size-complex="18pt" style:font-weight-complex="bold"/>
    </style:style>
    <style:style style:name="P21" style:family="paragraph" style:parent-style-name="Standard" style:list-style-name="">
      <style:paragraph-properties fo:margin-top="0.494cm" fo:margin-bottom="0.494cm" style:contextual-spacing="false" fo:line-height="100%"/>
      <style:text-properties officeooo:paragraph-rsid="000beea1"/>
    </style:style>
    <style:style style:name="P22" style:family="paragraph" style:parent-style-name="Heading_20_3">
      <style:text-properties officeooo:paragraph-rsid="000beea1"/>
    </style:style>
    <style:style style:name="P23" style:family="paragraph" style:parent-style-name="Heading_20_3">
      <style:text-properties fo:font-size="18pt" fo:font-weight="bold" officeooo:paragraph-rsid="000beea1" style:font-size-asian="18pt" style:font-weight-asian="bold" style:font-size-complex="18pt" style:font-weight-complex="bold"/>
    </style:style>
    <style:style style:name="P24" style:family="paragraph" style:parent-style-name="Text_20_body" style:list-style-name="L1"/>
    <style:style style:name="P25" style:family="paragraph" style:parent-style-name="Text_20_body" style:list-style-name="L1">
      <style:text-properties fo:font-weight="bold"/>
    </style:style>
    <style:style style:name="P26" style:family="paragraph" style:parent-style-name="Text_20_body" style:list-style-name="L2"/>
    <style:style style:name="P27" style:family="paragraph" style:parent-style-name="Text_20_body" style:list-style-name="L3">
      <style:paragraph-properties fo:margin-top="0cm" fo:margin-bottom="0.499cm" style:contextual-spacing="false" fo:line-height="114%"/>
      <style:text-properties style:font-name="Google Sans Text"/>
    </style:style>
    <style:style style:name="P28" style:family="paragraph" style:parent-style-name="Text_20_body" style:list-style-name="L4">
      <style:paragraph-properties fo:margin-top="0cm" fo:margin-bottom="0.499cm" style:contextual-spacing="false" fo:line-height="114%"/>
      <style:text-properties style:font-name="Google Sans Text"/>
    </style:style>
    <style:style style:name="P29" style:family="paragraph" style:parent-style-name="Text_20_body" style:list-style-name="L5">
      <style:paragraph-properties fo:margin-top="0cm" fo:margin-bottom="0.499cm" style:contextual-spacing="false" fo:line-height="114%"/>
    </style:style>
    <style:style style:name="P30" style:family="paragraph" style:parent-style-name="Text_20_body" style:list-style-name="L6">
      <style:paragraph-properties fo:margin-top="0cm" fo:margin-bottom="0.499cm" style:contextual-spacing="false" fo:line-height="114%" fo:padding="0cm" fo:border="none"/>
    </style:style>
    <style:style style:name="P31" style:family="paragraph" style:parent-style-name="Text_20_body" style:list-style-name="L7">
      <style:paragraph-properties fo:margin-top="0cm" fo:margin-bottom="0cm" style:contextual-spacing="false"/>
    </style:style>
    <style:style style:name="T1" style:family="text">
      <style:text-properties fo:font-weight="bold"/>
    </style:style>
    <style:style style:name="T2" style:family="text">
      <style:text-properties fo:font-weight="bold" officeooo:rsid="0015005b"/>
    </style:style>
    <style:style style:name="T3" style:family="text">
      <style:text-properties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2pt" fo:font-weight="bold" officeooo:rsid="000beea1" style:font-name-asian="Arial1" style:font-size-asian="12pt" style:font-weight-asian="bold" style:font-name-complex="Arial1" style:font-size-complex="12pt" style:font-weight-complex="bold"/>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style:font-name="Times New Roman" fo:font-size="16pt" fo:font-weight="bold" officeooo:rsid="0015005b" style:font-size-asian="16pt" style:font-weight-asian="bold" style:font-name-complex="Times New Roman1" style:font-size-complex="16pt"/>
    </style:style>
    <style:style style:name="T7" style:family="text">
      <style:text-properties style:font-name="Times New Roman" fo:font-size="14pt" fo:font-weight="bold" style:font-name-asian="Times New Roman1" style:font-size-asian="14pt" style:language-asian="tr" style:country-asian="TR" style:font-weight-asian="bold" style:font-name-complex="Times New Roman1" style:font-size-complex="14pt" style:font-weight-complex="bold"/>
    </style:style>
    <style:style style:name="T8" style:family="text">
      <style:text-properties style:font-name="Times New Roman" fo:font-size="14pt" fo:font-weight="normal" style:font-name-asian="Times New Roman1" style:font-size-asian="14pt" style:language-asian="tr" style:country-asian="TR" style:font-weight-asian="normal" style:font-name-complex="Times New Roman1" style:font-size-complex="14pt" style:font-weight-complex="normal"/>
    </style:style>
    <style:style style:name="T9" style:family="text">
      <style:text-properties fo:color="#0070c0" loext:opacity="100%" style:font-name="Times New Roman" fo:font-size="16pt" fo:font-weight="bold" style:font-name-asian="Arial1" style:font-size-asian="16pt" style:font-weight-asian="bold" style:font-name-complex="Times New Roman1" style:font-size-complex="16pt" style:font-weight-complex="bold"/>
    </style:style>
    <style:style style:name="T10" style:family="text">
      <style:text-properties fo:color="#ff0000" loext:opacity="100%" style:font-name="Times New Roman" fo:font-size="16pt" fo:font-weight="bold" style:font-name-asian="Arial1" style:font-size-asian="16pt" style:font-weight-asian="bold" style:font-name-complex="Times New Roman1" style:font-size-complex="16pt" style:font-weight-complex="bold"/>
    </style:style>
    <style:style style:name="T11" style:family="text">
      <style:text-properties fo:color="#ff0000" loext:opacity="100%" style:font-name="Times New Roman" fo:font-size="16pt" fo:font-weight="bold" style:letter-kerning="true" style:font-name-asian="Times New Roman1" style:font-size-asian="16pt" style:language-asian="tr" style:country-asian="TR" style:font-weight-asian="bold" style:font-name-complex="Times New Roman1" style:font-size-complex="16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officeooo:rsid="000c4c1f"/>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000000" loext:opacity="100%" style:font-name="Times New Roman" fo:font-size="16pt" fo:font-weight="bold" style:letter-kerning="true" style:font-name-asian="Times New Roman1" style:font-size-asian="16pt" style:language-asian="tr" style:country-asian="TR" style:font-weight-asian="bold" style:font-name-complex="Times New Roman1" style:font-size-complex="16pt" style:font-weight-complex="bold"/>
    </style:style>
    <style:style style:name="T16" style:family="text">
      <style:text-properties officeooo:rsid="0015005b"/>
    </style:style>
    <style:style style:name="T17" style:family="text">
      <style:text-properties style:font-name="Google Sans Text"/>
    </style:style>
    <style:style style:name="T18" style:family="text">
      <style:text-properties style:font-name="Google Sans Text" fo:font-weight="bold"/>
    </style:style>
    <style:style style:name="T19" style:family="text">
      <style:text-properties officeooo:rsid="001855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KARA UNIVERSITY </text:p>
      <text:p text:style-name="P7">FACULTY OF ENGINEERING</text:p>
      <text:p text:style-name="P6">DEPARTMENT OF COMPUTER ENGINEERING</text:p>
      <text:p text:style-name="P4"><draw:frame draw:style-name="fr2" draw:name="image3.png" text:anchor-type="as-char" svg:width="5.001cm" svg:height="5.001cm" draw:z-index="0"><draw:image xlink:href="Pictures/10000000000001B1000001B1EA8010D20DED931E.png" xlink:type="simple" xlink:show="embed" xlink:actuate="onLoad" draw:mime-type="image/png"/></draw:frame></text:p>
      <text:p text:style-name="P6"/>
      <text:p text:style-name="P13">BLM4522 Ağ Tabanlı Paralel Tanıtım Sistemleri</text:p>
      <text:p text:style-name="P5"><text:span text:style-name="T9"><text:line-break/></text:span><text:span text:style-name="T5">Proje </text:span><text:span text:style-name="T6">5</text:span><text:span text:style-name="T5">: </text:span><text:span text:style-name="T15">Veri Temizleme ve ETL Süreçleri Tasarımı</text:span><text:span text:style-name="T11"> </text:span><text:span text:style-name="T10"><text:line-break/></text:span></text:p>
      <text:p text:style-name="P4"><text:span text:style-name="T3">T</text:span><text:span text:style-name="T4">uğrul Özgün</text:span><text:span text:style-name="T3"> </text:span></text:p>
      <text:p text:style-name="P4"><text:span text:style-name="T3">2</text:span><text:span text:style-name="T4">2290082</text:span></text:p>
      <text:h text:style-name="P20" text:outline-level="2"/>
      <text:h text:style-name="P21" text:outline-level="2"><text:span text:style-name="T7">Git link: </text:span><text:span text:style-name="T8">https://github.com/Forcipus/Paralel-Sistemler</text:span></text:h>
      <text:h text:style-name="P21" text:outline-level="2"><text:span text:style-name="T7">Video link: </text:span><text:span text:style-name="T8">https://drive.google.com/drive/folders/1aXqYA1RbEGioQ-7k64ovt--p6e0QNuGY?usp=sharing</text:span></text:h>
      <text:h text:style-name="P21" text:outline-level="2"><text:span text:style-name="Internet_20_link"><text:span text:style-name="T7"/></text:span></text:h>
      <text:h text:style-name="P21" text:outline-level="2"><text:soft-page-break/><text:span text:style-name="Internet_20_link"><text:span text:style-name="T7"/></text:span></text:h>
      <text:p text:style-name="P16">İÇİNDEKİLER</text:p>
      <text:list text:style-name="L1">
        <text:list-item>
          <text:p text:style-name="P25">GİRİŞ VE AMAÇ...................................................................................................................<text:span text:style-name="T16">2</text:span></text:p>
          <text:list>
            <text:list-item>
              <text:p text:style-name="P24">1.1. Kapsam ve Metodoloji</text:p>
            </text:list-item>
          </text:list>
        </text:list-item>
        <text:list-item>
          <text:p text:style-name="P25">VERİ ÇEKME (EXTRACT) VE KİRLİ VERİ SENARYOSU.........................................<text:span text:style-name="T16">3</text:span></text:p>
          <text:list>
            <text:list-item>
              <text:p text:style-name="P24">2.1. Kurumsal Veri Ambarı Öncesi Ham Veri Anomalileri</text:p>
            </text:list-item>
            <text:list-item>
              <text:p text:style-name="P24">2.2. T-SQL ile Kontrollü Kirli Veri Havuzu Oluşturulması</text:p>
            </text:list-item>
          </text:list>
        </text:list-item>
        <text:list-item>
          <text:p text:style-name="P25">VERİ TEMİZLEME VE DÖNÜŞTÜRME (TRANSFORM)...........................................<text:span text:style-name="T16">4</text:span></text:p>
          <text:list>
            <text:list-item>
              <text:p text:style-name="P24">3.1. Hedef Veri Ambarı Şemasının (Dimension Table) Tasarımı</text:p>
            </text:list-item>
            <text:list-item>
              <text:p text:style-name="P24">3.2. Yapısal Bozuklukların T-SQL Fonksiyonları ile Ayıklanması</text:p>
            </text:list-item>
          </text:list>
        </text:list-item>
        <text:list-item>
          <text:p text:style-name="P25">FARKLI KAYNAKLARDAN VERİ ENTEGRASYONU...............................................<text:span text:style-name="T16">5</text:span></text:p>
          <text:list>
            <text:list-item>
              <text:p text:style-name="P24">4.1. Heterojen Kaynakların Birleştirilmesi ve Format Uyumsuzlukları</text:p>
            </text:list-item>
            <text:list-item>
              <text:p text:style-name="P24">4.2. Katmanlar Arası Veri Uyuşmazlıklarının (Data Mismatch) Çözümü</text:p>
            </text:list-item>
          </text:list>
        </text:list-item>
        <text:list-item>
          <text:p text:style-name="P25">VERİ YÜKLEME (LOAD) VE VERİ KALİTESİ RAPORLARI.................................<text:span text:style-name="T19">7</text:span></text:p>
          <text:list>
            <text:list-item>
              <text:p text:style-name="P24">5.1. Tam Yükleme (Full Load) Stratejisi ve Tutarlılık Testleri</text:p>
            </text:list-item>
            <text:list-item>
              <text:p text:style-name="P24">5.2. Dinamik Veri Kalitesi ve Sistem Sağlığı Raporlama Sorguları</text:p>
            </text:list-item>
          </text:list>
        </text:list-item>
        <text:list-item>
          <text:p text:style-name="P25">SONUÇ................................................................................................................................<text:span text:style-name="T19">9</text:span></text:p>
        </text:list-item>
      </text:list>
      <text:h text:style-name="P21" text:outline-level="2"><text:span text:style-name="Internet_20_link"><text:span text:style-name="T7"/></text:span></text:h>
      <text:h text:style-name="P21" text:outline-level="2"><text:span text:style-name="Internet_20_link"><text:span text:style-name="T7"/></text:span></text:h>
      <text:h text:style-name="P21" text:outline-level="2"><text:span text:style-name="Internet_20_link"><text:span text:style-name="T7"/></text:span></text:h>
      <text:h text:style-name="P21" text:outline-level="2"><text:span text:style-name="Internet_20_link"><text:span text:style-name="T7"/></text:span></text:h>
      <text:h text:style-name="P9" text:outline-level="2"><text:soft-page-break/>1. GİRİŞ VE AMAÇ</text:h>
      <text:p text:style-name="Text_20_body">Modern bilgi sistemlerinde, farklı departmanlardan, harici web servislerinden veya üçüncü parti yazılımlardan gelen veriler çoğunlukla heterojen, düzensiz ve hatalı yapılara sahiptir. Bu verilerin ham haliyle analitik sistemlere veya kurumsal raporlama araçlarına aktarılması, hatalı kararlara ve sistem mimarisinde kararsızlıklara yol açar. Bu nedenle, verinin işlenmeden önce bir mühendislik süzgecinden geçirilmesi, yani ETL (Extract, Transform, Load) süreçlerine tabi tutulması iş zekası altyapılarının en temel gereksinimidir.</text:p>
      <text:p text:style-name="Text_20_body">Bu projenin temel amacı; Microsoft SQL Server katmanında, kurumsal veri ambarı (Data Warehouse) mantığına uygun bir ETL mimarisi tasarlamaktır. Proje kapsamında <text:span text:style-name="Source_20_Text">WideWorldImporters</text:span> örnek veritabanı kullanılarak; ham operasyonel verilerin güvenli bir şekilde çekilmesi (Extract), veri kümesindeki eksikliklerin, format bozukluklarının ve tutarsızlıkların SQL fonksiyonlarıyla giderilmesi (Transform), dış kaynaklardan gelen yapısal olarak uyumsuz verilerin entegre edilmesi ve temizlenen verilerin nihai raporlama tablolarına kalıcı olarak aktarılması (Load) süreçleri uygulamalı olarak simüle edilmiştir.</text:p>
      <text:h text:style-name="Heading_20_3" text:outline-level="3">1.1. Kapsam ve Metodoloji</text:h>
      <text:p text:style-name="Text_20_body">Proje süresince aşağıdaki temel veritabanı yönetim süreçleri gerçekleştirilmiştir:</text:p>
      <text:list text:style-name="L2">
        <text:list-item>
          <text:p text:style-name="P26"><text:span text:style-name="T18">Extract (Veri Çekme):</text:span><text:span text:style-name="T17"> </text:span><text:span text:style-name="Source_20_Text"><text:span text:style-name="T17">WideWorldImporters</text:span></text:span><text:span text:style-name="T17"> operasyonel tablolarından ham veriler çekilmiş, veri anomalilerini görünür kılmak amacıyla kontrollü bozulmalar enjekte edilerek geçici veri katmanı oluşturulmuştur.</text:span></text:p>
        </text:list-item>
        <text:list-item text:style-override="L3">
          <text:p text:style-name="P27"><text:bookmark text:name="p-rc_af72f8873f358cb5-328"/><text:span text:style-name="T1">Transform (Veri Temizleme ve Dönüştürme):</text:span> Bozuk veri kümesindeki eksik alanlar (NULL) giderilmiş , tutarsız metinsel telefon alanları kurumsal maskeleme standartlarına dönüştürülmüş , adres alanları normalize edilmiş ve uyumsuz veri tipleri gerçek veri ambarı standartlarına çekilmiştir. </text:p>
        </text:list-item>
        <text:list-item text:style-override="L4">
          <text:p text:style-name="P28"><text:bookmark text:name="p-rc_af72f8873f358cb5-329"/><text:span text:style-name="T1">Data Integration (Veri Entegrasyonu):</text:span> Farklı bir iş modelinden gelen ve yapısal kodları tamamen uyumsuz olan harici bir veri kümesi, ilişkisel join mekanizmaları ve mantıksal dönüştürme blokları üzerinden sisteme entegre edilmiştir. </text:p>
        </text:list-item>
        <text:list-item text:style-override="L5">
          <text:p text:style-name="P29"><text:bookmark text:name="p-rc_af72f8873f358cb5-330"/><text:span text:style-name="T18">Load (Veri Yükleme) ve Raporlama:</text:span><text:span text:style-name="T17"> Hedef tablolar Primary Key bütünlüğünü korumak adına tam yükleme (Full Load) stratejisiyle beslenmiş ve süreç sonunda kurumsal KPI göstergelerine uygun veri kalitesi raporları T-SQL ile betimlenmiştir.</text:span></text:p>
        </text:list-item>
      </text:list>
      <text:h text:style-name="P9" text:outline-level="2"/>
      <text:p text:style-name="P10"/>
      <text:p text:style-name="P10"/>
      <text:h text:style-name="P3" text:outline-level="2"><text:soft-page-break/><text:span text:style-name="T12">2. </text:span>VERİ ÇEKME (EXTRACT) VE KİRLİ VERİ SENARYOSU </text:h>
      <text:p text:style-name="P2">ETL süreçlerinin ilk adımı, operasyonel kaynaklarda biriken ham verilerin analitik katmanlara aktarılmak üzere güvenli bir şekilde çekilmesidir. Bu bölümde, veri temizleme algoritmalarının kurumsal düzeyde test edilebilmesi amacıyla, ilişkisel bütünlüğü bozacak yapısal anomali ve hataların ham veri havuzuna enjekte edilme süreçleri ele alınmıştır. </text:p>
      <text:p text:style-name="P15">2.1. Kurumsal Veri Ambarı Öncesi Ham Veri Anomalileri</text:p>
      <text:p text:style-name="P19"><text:span text:style-name="T14">Gerçek dünya veritabanı projelerinde ham veriler, temiz bir yapıda bulunmaz. Karşılaşılan en yaygın anomaliler arasında; zorunlu olması gereken iletişim alanlarının boş bırakılması (</text:span><text:span text:style-name="Source_20_Text"><text:span text:style-name="T14">NULL</text:span></text:span><text:span text:style-name="T14"> değerler) , telefon numaralarının kullanıcılar tarafından farklı karakterlerle (boşluk, parantez, tire) düzensiz girilmesi , adres yapılarında standart büyük/küçük harf kurallarına uyulmaması ve tarih bilgilerinin indeksleme ve sorgulamayı zorlaştıracak şekilde metin (</text:span><text:span text:style-name="Source_20_Text"><text:span text:style-name="T14">VARCHAR</text:span></text:span><text:span text:style-name="T14">) formatında saklanması yer alır. Bir ETL mimarisinin başarısı, bu anomalileri kaynak sistemlerden çekerken (Extract) doğru tespit edebilme yeteneğine bağlıdır. </text:span></text:p>
      <text:h text:style-name="P22" text:outline-level="3" text:is-list-header="true">2.2. T-SQL ile Kontrollü Kirli Veri Havuzu Oluşturulması </text:h>
      <text:p text:style-name="Text_20_body"><text:span text:style-name="Source_20_Text">WideWorldImporters</text:span> veritabanının orijinal müşteri tablosu (<text:span text:style-name="Source_20_Text">Sales.Customers</text:span>) oldukça düzenli bir yapıya sahiptir. Bu çalışmada, veri temizleme operasyonlarını kurumsal ölçekte simüle edebilmek adına, orijinal tablodaki veriler çekilirken içerisine matematiksel modüler algoritmalarla sistematik hatalar enjekte edilmiş ve <text:span text:style-name="Source_20_Text">Ha</text:span><draw:frame draw:style-name="fr1" draw:name="Image1" text:anchor-type="char" svg:x="6.646cm" svg:y="0.157cm" svg:width="11.266cm" svg:height="9.405cm" draw:z-index="1"><draw:image xlink:href="Pictures/1000000100000467000003ADE220A3F3889D891C.png" xlink:type="simple" xlink:show="embed" xlink:actuate="onLoad" draw:mime-type="image/png"/></draw:frame><text:span text:style-name="Source_20_Text">m_Musteri_Verisi</text:span> isminde kirli bir ara katman tablosu üretilmiştir: </text:p>
      <text:p text:style-name="P12">SQL</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 1. ADIM: ETL İÇİN KİRLİ KAYNAK TABLONUN OLUŞTURULMASI (EXTRACT)</text:span></text:p>
      <text:p text:style-name="Preformatted_20_Text"><text:span text:style-name="Source_20_Text">IF OBJECT_ID('WideWorldImporters.dbo.Ham_Musteri_Verisi', 'U') IS NOT NULL</text:span></text:p>
      <text:p text:style-name="Preformatted_20_Text"><text:span text:style-name="Source_20_Text"><text:s text:c="4"/>DROP TABLE WideWorldImporters.dbo.Ham_Musteri_Verisi;</text:span></text:p>
      <text:p text:style-name="Preformatted_20_Text"><text:span text:style-name="Source_20_Text">GO</text:span></text:p>
      <text:p text:style-name="Preformatted_20_Text"/>
      <text:p text:style-name="Preformatted_20_Text"><text:span text:style-name="Source_20_Text">SELECT TOP 1000 </text:span></text:p>
      <text:p text:style-name="Preformatted_20_Text"><text:span text:style-name="Source_20_Text"><text:s text:c="4"/>CustomerID,</text:span></text:p>
      <text:p text:style-name="Preformatted_20_Text"><text:span text:style-name="Source_20_Text"><text:s text:c="4"/>CustomerName,</text:span></text:p>
      <text:p text:style-name="Preformatted_20_Text"><text:span text:style-name="Source_20_Text"><text:s text:c="4"/>-- 1. Hata Enjeksiyonu: Her 5 müşteriden birinin iletişim bilgisini NULL yapıyoruz</text:span></text:p>
      <text:p text:style-name="Preformatted_20_Text"><text:span text:style-name="Source_20_Text"><text:s text:c="4"/>CASE WHEN CustomerID % 5 = 0 THEN NULL ELSE PrimaryContactPersonID END AS </text:span><text:soft-page-break/><text:span text:style-name="Source_20_Text">ContactPerson,</text:span></text:p>
      <text:p text:style-name="Preformatted_20_Text"><text:span text:style-name="Source_20_Text"><text:s text:c="4"/></text:span></text:p>
      <text:p text:style-name="Preformatted_20_Text"><text:span text:style-name="Source_20_Text"><text:s text:c="4"/>-- 2. Hata Enjeksiyonu: Telefonlardaki parantezleri siliyor ve bazılarını sahte '000' formatına çekiyoruz</text:span></text:p>
      <text:p text:style-name="Preformatted_20_Text"><text:span text:style-name="Source_20_Text"><text:s text:c="4"/>CASE </text:span></text:p>
      <text:p text:style-name="Preformatted_20_Text"><text:span text:style-name="Source_20_Text"><text:s text:c="8"/>WHEN CustomerID % 3 = 0 THEN REPLACE(REPLACE(PhoneNumber, '(', ''), ')', '')</text:span></text:p>
      <text:p text:style-name="Preformatted_20_Text"><text:span text:style-name="Source_20_Text"><text:s text:c="8"/>WHEN CustomerID % 4 = 0 THEN '000-000-0000'</text:span></text:p>
      <text:p text:style-name="Preformatted_20_Text"><text:span text:style-name="Source_20_Text"><text:s text:c="8"/>ELSE PhoneNumber </text:span></text:p>
      <text:p text:style-name="Preformatted_20_Text"><text:span text:style-name="Source_20_Text"><text:s text:c="4"/>END AS PhoneNumber,</text:span></text:p>
      <text:p text:style-name="Preformatted_20_Text"><text:span text:style-name="Source_20_Text"><text:s text:c="4"/></text:span></text:p>
      <text:p text:style-name="Preformatted_20_Text"><text:span text:style-name="Source_20_Text"><text:s text:c="4"/>-- 3. Hata Enjeksiyonu: Adres satırlarında büyük/küçük harf karmaşası yaratıyoruz</text:span></text:p>
      <text:p text:style-name="Preformatted_20_Text"><text:span text:style-name="Source_20_Text"><text:s text:c="4"/>CASE </text:span></text:p>
      <text:p text:style-name="Preformatted_20_Text"><text:span text:style-name="Source_20_Text"><text:s text:c="8"/>WHEN CustomerID % 2 = 0 THEN LOWER(DeliveryAddressLine1)</text:span></text:p>
      <text:p text:style-name="Preformatted_20_Text"><text:span text:style-name="Source_20_Text"><text:s text:c="8"/>ELSE UPPER(DeliveryAddressLine1)</text:span></text:p>
      <text:p text:style-name="Preformatted_20_Text"><text:span text:style-name="Source_20_Text"><text:s text:c="4"/>END AS DeliveryAddress,</text:span></text:p>
      <text:p text:style-name="Preformatted_20_Text"><text:span text:style-name="Source_20_Text"><text:s text:c="4"/></text:span></text:p>
      <text:p text:style-name="Preformatted_20_Text"><text:span text:style-name="Source_20_Text"><text:s text:c="4"/>-- 4. Hata Enjeksiyonu: Tarih bilgisini metinsel VARCHAR formatına dönüştürüyoruz</text:span></text:p>
      <text:p text:style-name="Preformatted_20_Text"><text:span text:style-name="Source_20_Text"><text:s text:c="4"/>CONVERT(VARCHAR(50), AccountOpenedDate, 105) AS RegistrationDate</text:span></text:p>
      <text:p text:style-name="Preformatted_20_Text"><text:span text:style-name="Source_20_Text">INTO WideWorldImporters.dbo.Ham_Musteri_Verisi</text:span></text:p>
      <text:p text:style-name="Preformatted_20_Text"><text:span text:style-name="Source_20_Text">FROM WideWorldImporters.Sales.Customers;</text:span></text:p>
      <text:p text:style-name="P11"><text:span text:style-name="Source_20_Text">GO</text:span></text:p>
      <text:p text:style-name="P10">3. VERİ TEMİZLEME VE DÖNÜŞTÜRME (TRANSFORM)</text:p>
      <text:p text:style-name="P17">Kaynak sistemlerden çekilen kirli verilerin analiz sistemlerini bozmaması için anomali barındıran alanların kurumsal standartlara göre ayıklanması gerekir. Bu doğrultuda, veritabanı bütünlük kısıtlamalarına sahip temiz bir hedef şema tasarlanmış; ham verideki eksiklikler, biçimsel bozukluklar ve veri tipi uyumsuzlukları ilişkisel T-SQL fonksiyonları kullanılarak dinamik olarak dönüştürülmüştür. </text:p>
      <text:p text:style-name="P14">3.1. Hedef Veri Ambarı Şemasının (Dimension Table) Tasarımı </text:p>
      <text:p text:style-name="Text_20_body">Temizlenen verilerin nihai analitik raporlamalara ve veri ambarı (Data Warehouse) katmanına aktarılabilmesi için, veri bütünlüğü kısıtlamalarına (Data Integrity Constraints) sahip, optimize edilmiş kararlı bir hedef tablo şeması tasarlanmıştır: </text:p>
      <text:p text:style-name="P12">SQL</text:p>
      <text:p text:style-name="Preformatted_20_Text"><text:span text:style-name="Source_20_Text">-- 2. ADIM: TEMİZ VERİ AMBARI HEDEF TABLOSUNUN OLUŞTURULMASI</text:span></text:p>
      <text:p text:style-name="Preformatted_20_Text"><text:span text:style-name="Source_20_Text">IF OBJECT_ID('WideWorldImporters.dbo.Dim_Musteri_Temiz', 'U') IS NOT NULL</text:span></text:p>
      <text:p text:style-name="Preformatted_20_Text"><text:span text:style-name="Source_20_Text"><text:s text:c="4"/>DROP TABLE WideWorldImporters.dbo.Dim_Musteri_Temiz;</text:span></text:p>
      <text:p text:style-name="Preformatted_20_Text"><text:span text:style-name="Source_20_Text">GO</text:span></text:p>
      <text:p text:style-name="Preformatted_20_Text"/>
      <text:p text:style-name="Preformatted_20_Text"><text:span text:style-name="Source_20_Text">CREATE TABLE WideWorldImporters.dbo.Dim_Musteri_Temiz (</text:span></text:p>
      <text:p text:style-name="Preformatted_20_Text"><text:span text:style-name="Source_20_Text"><text:s text:c="4"/>CustomerID INT PRIMARY KEY,</text:span></text:p>
      <text:p text:style-name="Preformatted_20_Text"><text:span text:style-name="Source_20_Text"><text:s text:c="4"/>CustomerName NVARCHAR(100),</text:span></text:p>
      <text:p text:style-name="Preformatted_20_Text"><text:span text:style-name="Source_20_Text"><text:s text:c="4"/>ContactPerson NVARCHAR(50), <text:s text:c="5"/>-- NULL veriler arındırılacak</text:span></text:p>
      <text:p text:style-name="Preformatted_20_Text"><text:span text:style-name="Source_20_Text"><text:s text:c="4"/>PhoneNumber NVARCHAR(30), <text:s text:c="7"/>-- Standart (XXX) XXX-XXXX maskesi uygulanacak</text:span></text:p>
      <text:p text:style-name="Preformatted_20_Text"><text:span text:style-name="Source_20_Text"><text:s text:c="4"/>DeliveryAddress NVARCHAR(200), <text:s text:c="2"/>-- Standart büyük harf yapılacak</text:span></text:p>
      <text:p text:style-name="Preformatted_20_Text"><text:span text:style-name="Source_20_Text"><text:s text:c="4"/>RegistrationDate DATE <text:s text:c="11"/>-- VARCHAR'dan gerçek DATE formatına dönecek</text:span></text:p>
      <text:p text:style-name="Preformatted_20_Text"><text:span text:style-name="Source_20_Text">);</text:span></text:p>
      <text:p text:style-name="P11"><text:span text:style-name="Source_20_Text">GO</text:span></text:p>
      <text:p text:style-name="Text_20_body"><text:soft-page-break/></text:p>
      <text:h text:style-name="P23" text:outline-level="3">3.2. Yapısal Bozuklukların T-SQL Fonksiyonları ile Ayıklanması </text:h>
      <text:p text:style-name="P18"><text:span text:style-name="T17">ETL mimarisinin kalbi olan </text:span><text:span text:style-name="T18">Transform</text:span><text:span text:style-name="T17"> aşamasında, </text:span><text:span text:style-name="Source_20_Text"><text:span text:style-name="T17">Ham_Musteri_Verisi</text:span></text:span><text:span text:style-name="T17"> tablosunda yer alan tüm yapısal anomali ve bozukluklar T-SQL mimarisinin ilişkisel fonksiyonları kullanılarak tek bir operasyonel insert şemsiyesi altında ayıklanmış ve temizlenmiştir:</text:span></text:p>
      <text:list text:style-name="L6">
        <text:list-item>
          <text:p text:style-name="P30"><text:bookmark text:name="p-rc_af72f8873f358cb5-332"/><text:span text:style-name="T18">Eksik Veri (NULL) Yönetimi:</text:span><text:span text:style-name="T17"> İletişim sorumlusu alanı boş (</text:span><text:span text:style-name="Source_20_Text"><text:span text:style-name="T17">NULL</text:span></text:span><text:span text:style-name="T17">) olan satırlar, analitik raporlamalarda boşluk hatası vermemesi adına </text:span><text:span text:style-name="Source_20_Text"><text:span text:style-name="T17">ISNULL</text:span></text:span><text:span text:style-name="T17"> fonksiyonu yardımıyla metinsel olarak 'Bilinmiyor' değerine atanmıştır. </text:span></text:p>
        </text:list-item>
        <text:list-item>
          <text:p text:style-name="P30"><text:bookmark text:name="p-rc_af72f8873f358cb5-333"/><text:span text:style-name="T18">Düzensiz Telefon Formatlarının Standardizasyonu:</text:span><text:span text:style-name="T17"> Telefon kolonundaki düzensiz metinleri ayıklamak amacıyla iç içe </text:span><text:span text:style-name="Source_20_Text"><text:span text:style-name="T17">REPLACE</text:span></text:span><text:span text:style-name="T17"> ve </text:span><text:span text:style-name="Source_20_Text"><text:span text:style-name="T17">SUBSTRING</text:span></text:span><text:span text:style-name="T17"> fonksiyonları kurgulanmıştır. Tüm telefon numaraları kurumsal iletişim maskesi olan </text:span><text:span text:style-name="Source_20_Text"><text:span text:style-name="T17">(XXX) XXX-XXXX</text:span></text:span><text:span text:style-name="T17"> formatına zorlanmıştır. Sistemdeki '000-000-0000' şeklindeki sahte kayıtlar ise </text:span><text:span text:style-name="Source_20_Text"><text:span text:style-name="T17">CASE WHEN</text:span></text:span><text:span text:style-name="T17"> kontrolüyle 'Geçersiz Numara' olarak etiketlenmiştir. </text:span></text:p>
        </text:list-item>
        <text:list-item>
          <text:p text:style-name="P30"><text:bookmark text:name="p-rc_af72f8873f358cb5-334"/><text:span text:style-name="T18">Metinsel Standardizasyon:</text:span><text:span text:style-name="T17"> Veri tabanındaki adres kayıtlarında yer alan irili ufaklı harf karmaşaları ve gereksiz kenar boşlukları </text:span><text:span text:style-name="Source_20_Text"><text:span text:style-name="T17">UPPER</text:span></text:span><text:span text:style-name="T17"> ve </text:span><text:span text:style-name="Source_20_Text"><text:span text:style-name="T17">TRIM</text:span></text:span><text:span text:style-name="T17"> fonksiyonel kombinasyonları ile temizlenerek tam kurumsal standarda çekilmiştir. </text:span></text:p>
        </text:list-item>
        <text:list-item>
          <text:p text:style-name="P30"><text:span text:style-name="T18">Veri Tipi Dönüştürme (Data Type Casting):</text:span><text:span text:style-name="T17"> İndeks taranmasını imkansız kılan ve sorgularda aritmetik zaman analizlerine izin vermeyen </text:span><text:span text:style-name="Source_20_Text"><text:span text:style-name="T17">VARCHAR</text:span></text:span><text:span text:style-name="T17"> tarih formatı, </text:span><text:span text:style-name="Source_20_Text"><text:span text:style-name="T17">CONVERT(DATE, ..., 105)</text:span></text:span><text:span text:style-name="T17"> parametresiyle ilişkisel veritabanı motorunun yerel </text:span><text:span text:style-name="Source_20_Text"><text:span text:style-name="T17">DATE</text:span></text:span><text:span text:style-name="T17"> veri tipine dönüştürülmüştür.</text:span></text:p>
        </text:list-item>
      </text:list>
      <text:h text:style-name="Heading_20_2" text:outline-level="2"><text:span text:style-name="T13">4</text:span>. FARKLI KAYNAKLARDAN VERİ ENTEGRASYONU </text:h>
      <text:p text:style-name="P8">Kurumsal bilgi sistemlerinde verilerin sadece yerel tablolardan değil, dış kaynaklardan heterojen formatlarda sisteme dahil edilmesi sık karşılaşılan bir mühendislik senaryosudur. Bu bölümde, harici bir platformdan gelen uyumsuz veri kodlarının ve katmanlar arası format farklılıklarından kaynaklanan uyuşmazlıkların (Data Mismatch) join mekanizmalarıyla nasıl çözüldüğü dökümante edilmiştir. </text:p>
      <text:h text:style-name="Heading_20_3" text:outline-level="3"><text:span text:style-name="T13">4</text:span>.1. Heterojen Kaynakların Birleştirilmesi ve Format Uyumsuzlukları </text:h>
      <text:p text:style-name="Text_20_body">Kurumsal ETL süreçlerinin en büyük zorluklarından biri, ana sisteme dışarıdan dahil olan (Örn: Excel, CSV veya harici bir e-ticaret API'si) heterojen verilerin iç şemaya entegre edilmesidir. Bu senaryoda, şirketin satın aldığı dış bir platformdan gelen <text:span text:style-name="Source_20_Text">Dis_Kaynak_Musteri</text:span> tablosu simüle edilmiştir. Bu harici tabloda, eyalet bilgileri sayısal ID yerine metinsel kodlarla (<text:span text:style-name="Source_20_Text">NY</text:span>, <text:span text:style-name="Source_20_Text">TX</text:span>), müşteri kategorileri ise metinsel iş modelleriyle (<text:span text:style-name="Source_20_Text">B2B</text:span>, <text:span text:style-name="Source_20_Text">B2C</text:span>) tutulmaktadır. </text:p>
      <text:list text:style-name="L7">
        <text:list-header>
          <text:p text:style-name="P31"/>
        </text:list-header>
      </text:list>
      <text:h text:style-name="Heading_20_3" text:outline-level="3"><text:soft-page-break/><text:span text:style-name="T13">4</text:span>.2. Katmanlar Arası Veri Uyuşmazlıklarının (Data Mismatch) Çözümü </text:h>
      <text:p text:style-name="Text_20_body">Dış kaynaktan gelen verileri <text:span text:style-name="Source_20_Text">WideWorldImporters</text:span> ilişkisel bütünlüğüne sadık kalarak entegre etmek amacıyla ana sistemin coğrafya (<text:span text:style-name="Source_20_Text">Application.StateProvinces</text:span>) ve kategori (<text:span text:style-name="Source_20_Text">Sales.CustomerCategories</text:span>) tabloları arasında <text:span text:style-name="Source_20_Text"><text:span text:style-name="T1">LEFT JOIN</text:span></text:span> bağıntıları kurulmuştur.</text:p>
      <text:p text:style-name="Text_20_body">Entegrasyon testi esnasında harici kaynaktan gelen 'NY' (New York) kodunun, ana sistem veritabanında 'N.Y.' (noktalı) olarak saklanmasından ötürü bir veri uyuşmazlığı (Data Mismatch) ve veri kaybı (<text:span text:style-name="Source_20_Text">NULL</text:span> değer dönmesi) saptanmıştır. Bu mühendislik engeli, join koşulunun içerisine dinamik bir <text:span text:style-name="Source_20_Text">CASE WHEN</text:span> mantıksal eşitleme katmanı eklenerek çözülmüş ve dış kaynak verilerinin sıfır kayıpla sisteme entegrasyonu tamamlanmıştır:</text:p>
      <text:p text:style-name="P12">SQL</text:p>
      <text:p text:style-name="Preformatted_20_Text"><text:span text:style-name="Source_20_Text">-- 3. ADIM: HARİCİ KAYNAK SİMÜLASYONU VE VERİ ENTEGRASYONU (INTEGRATION)</text:span></text:p>
      <text:p text:style-name="Preformatted_20_Text"><text:span text:style-name="Source_20_Text">IF OBJECT_ID('WideWorldImporters.dbo.Dis_Kaynak_Musteri', 'U') IS NOT NULL</text:span></text:p>
      <text:p text:style-name="Preformatted_20_Text"><text:span text:style-name="Source_20_Text"><text:s text:c="4"/>DROP TABLE WideWorldImporters.dbo.Dis_Kaynak_Musteri;</text:span></text:p>
      <text:p text:style-name="Preformatted_20_Text"><text:span text:style-name="Source_20_Text">GO</text:span></text:p>
      <text:p text:style-name="Preformatted_20_Text"/>
      <text:p text:style-name="Preformatted_20_Text"><text:span text:style-name="Source_20_Text">CREATE TABLE WideWorldImporters.dbo.Dis_Kaynak_Musteri (</text:span></text:p>
      <text:p text:style-name="Preformatted_20_Text"><text:span text:style-name="Source_20_Text"><text:s text:c="4"/>DisID INT,</text:span></text:p>
      <text:p text:style-name="Preformatted_20_Text"><text:span text:style-name="Source_20_Text"><text:s text:c="4"/>Isim NVARCHAR(100),</text:span></text:p>
      <text:p text:style-name="Preformatted_20_Text"><text:span text:style-name="Source_20_Text"><text:s text:c="4"/>EyaletKodu NVARCHAR(10),</text:span></text:p>
      <text:p text:style-name="Preformatted_20_Text"><text:span text:style-name="Source_20_Text"><text:s text:c="4"/>MusteriTipi NVARCHAR(20)</text:span></text:p>
      <text:p text:style-name="Preformatted_20_Text"><text:span text:style-name="Source_20_Text">);</text:span></text:p>
      <text:p text:style-name="Preformatted_20_Text"><text:span text:style-name="Source_20_Text">GO</text:span></text:p>
      <text:p text:style-name="Preformatted_20_Text"/>
      <text:p text:style-name="Preformatted_20_Text"><text:span text:style-name="Source_20_Text">INSERT INTO </text:span><draw:frame draw:style-name="fr1" draw:name="Image2" text:anchor-type="char" svg:x="6.973cm" svg:y="2.817cm" svg:width="11.792cm" svg:height="7.214cm" draw:z-index="2"><draw:image xlink:href="Pictures/1000000100000609000003B17D1A11057ECA02D8.png" xlink:type="simple" xlink:show="embed" xlink:actuate="onLoad" draw:mime-type="image/png"/></draw:frame><text:span text:style-name="Source_20_Text">WideWorldImporters.dbo.Dis_Kaynak_Musteri VALUES </text:span></text:p>
      <text:p text:style-name="Preformatted_20_Text"><text:span text:style-name="Source_20_Text">(9001, 'Anadolu Lojistik', 'NY', 'B2B'),</text:span></text:p>
      <text:p text:style-name="Preformatted_20_Text"><text:span text:style-name="Source_20_Text">(9002, 'Ahmet Yılmaz', 'TX', 'B2C');</text:span></text:p>
      <text:p text:style-name="Preformatted_20_Text"><text:span text:style-name="Source_20_Text">GO</text:span></text:p>
      <text:p text:style-name="Preformatted_20_Text"/>
      <text:p text:style-name="Preformatted_20_Text"><text:span text:style-name="Source_20_Text">-- Entegrasyon ve Dönüştürme Sorgusu</text:span></text:p>
      <text:p text:style-name="Preformatted_20_Text"><text:span text:style-name="Source_20_Text">SELECT </text:span></text:p>
      <text:p text:style-name="Preformatted_20_Text"><text:span text:style-name="Source_20_Text"><text:s text:c="4"/>dk.DisID AS CustomerID,</text:span></text:p>
      <text:p text:style-name="Preformatted_20_Text"><text:span text:style-name="Source_20_Text"><text:s text:c="4"/>dk.Isim AS CustomerName,</text:span></text:p>
      <text:p text:style-name="Preformatted_20_Text"><text:span text:style-name="Source_20_Text"><text:s text:c="4"/>COALESCE(sp.StateProvinceID, 0) AS StateProvinceID, -- Uyuşmazlık durumunda 0 basar</text:span></text:p>
      <text:p text:style-name="Preformatted_20_Text"><text:span text:style-name="Source_20_Text"><text:s text:c="4"/>CASE </text:span></text:p>
      <text:p text:style-name="Preformatted_20_Text"><text:span text:style-name="Source_20_Text"><text:s text:c="8"/>WHEN dk.MusteriTipi = 'B2B' THEN (SELECT TOP 1 CustomerCategoryID FROM Sales.CustomerCategories WHERE CustomerCategoryName = 'Novelty Items Shop')</text:span></text:p>
      <text:p text:style-name="Preformatted_20_Text"><text:span text:style-name="Source_20_Text"><text:s text:c="8"/>WHEN dk.MusteriTipi = 'B2C' THEN (SELECT TOP 1 CustomerCategoryID FROM Sales.CustomerCategories WHERE CustomerCategoryName = 'Computer Store')</text:span></text:p>
      <text:p text:style-name="Preformatted_20_Text"><text:span text:style-name="Source_20_Text"><text:s text:c="8"/>ELSE 4 </text:span></text:p>
      <text:p text:style-name="Preformatted_20_Text"><text:span text:style-name="Source_20_Text"><text:s text:c="4"/>END AS CustomerCategoryID</text:span></text:p>
      <text:p text:style-name="Preformatted_20_Text"><text:span text:style-name="Source_20_Text">FROM WideWorldImporters.dbo.Dis_Kaynak_Musteri dk</text:span></text:p>
      <text:p text:style-name="Preformatted_20_Text"><text:span text:style-name="Source_20_Text">LEFT JOIN Application.StateProvinces sp </text:span></text:p>
      <text:p text:style-name="Preformatted_20_Text"><text:span text:style-name="Source_20_Text"><text:s text:c="4"/>-- Uyuşmazlık Giderme: Dış kaynak 'NY' verisini iç sistemin 'N.Y.' formatına mapliyoruz</text:span></text:p>
      <text:p text:style-name="Preformatted_20_Text"><text:span text:style-name="Source_20_Text"><text:s text:c="4"/>ON CASE WHEN dk.EyaletKodu = 'NY' THEN 'N.Y.' ELSE dk.EyaletKodu END = </text:span><text:soft-page-break/><text:span text:style-name="Source_20_Text">sp.StateProvinceCode;</text:span></text:p>
      <text:p text:style-name="P11"><text:span text:style-name="Source_20_Text">GO</text:span></text:p>
      <text:p text:style-name="P11"><text:span text:style-name="Source_20_Text"/></text:p>
      <text:p text:style-name="P8"/>
      <text:h text:style-name="Heading_20_2" text:outline-level="2"><text:span text:style-name="T13">5</text:span>. VERİ YÜKLEME (LOAD) VE VERİ KALİTESİ RAPORLARI </text:h>
      <text:p text:style-name="P8">ETL boru hattının son evresi, temizlenen ve standart hale getirilen veri paketlerinin kalıcı veri ambarı tablolarına güvenli bir şekilde yazdırılmasıdır. Bu süreçte veri tekrarlarını önleyen kurumsal bir yükleme stratejisi benimsenmiş, ayrıca sistemin sağlık durumunu ve anlık veri güvenilirlik oranını üst yönetime sunan dinamik bir kalite raporlama altyapısı kurgulanmıştır. </text:p>
      <text:h text:style-name="Heading_20_3" text:outline-level="3" text:is-list-header="true"><text:span text:style-name="T13">5</text:span>.1. Tam Yükleme (Full Load) Stratejisi ve Tutarlılık Testleri </text:h>
      <text:p text:style-name="Text_20_body">ETL sürecinin son adımı olan <text:span text:style-name="T1">Load</text:span> evresinde, temizlenen ve yapısal dönüşümü tamamlanan veriler kalıcı veri ambarı tablosuna yüklenmiştir. Bu aşamada, mükerrer veri basılmasını önlemek ve Primary Key kısıtlaması ihlallerinden (Violation of PRIMARY KEY constraint) kaçınmak adına kurumsal bir <text:span text:style-name="T1">Full Load (Tam Yükleme)</text:span> stratejisi benimsenmiştir. Yükleme komutundan hemen önce hedef tablo <text:span text:style-name="Source_20_Text"><text:span text:style-name="T1">TRUNCATE TABLE</text:span></text:span> komutuyla güvenli bir şekilde sıfırlanmış, ardından 1000 satırlık temiz paket hatasız bir şekilde kalıcı şemaya yazdırılmıştır: </text:p>
      <text:p text:style-name="P12">SQL</text:p>
      <text:p text:style-name="Preformatted_20_Text"><text:span text:style-name="Source_20_Text">-- 4. ADIM: VERİLERİN HEDEF TABLOYA YÜKLENMESİ (LOAD)</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TRUNCATE TABLE WideWorldImporters.dbo.Dim_Musteri_Temiz;</text:span></text:p>
      <text:p text:style-name="Preformatted_20_Text"><text:span text:style-name="Source_20_Text">GO</text:span></text:p>
      <text:p text:style-name="Preformatted_20_Text"/>
      <text:p text:style-name="Preformatted_20_Text"><text:span text:style-name="Source_20_Text">INSERT INTO WideWorldImporters.dbo.Dim_Musteri_Temiz</text:span></text:p>
      <text:p text:style-name="Preformatted_20_Text"><text:span text:style-name="Source_20_Text">SELECT </text:span></text:p>
      <text:p text:style-name="Preformatted_20_Text"><text:span text:style-name="Source_20_Text"><text:s text:c="4"/>CustomerID,</text:span></text:p>
      <text:p text:style-name="Preformatted_20_Text"><text:span text:style-name="Source_20_Text"><text:s text:c="4"/>CustomerName,</text:span></text:p>
      <text:p text:style-name="Preformatted_20_Text"><text:span text:style-name="Source_20_Text"><text:s text:c="4"/>ISNULL(CAST(ContactPerson AS NVARCHAR(50)), 'Bilinmiyor'),</text:span></text:p>
      <text:p text:style-name="Preformatted_20_Text"><text:span text:style-name="Source_20_Text"><text:s text:c="4"/>CASE </text:span></text:p>
      <text:p text:style-name="Preformatted_20_Text"><text:span text:style-name="Source_20_Text"><text:s text:c="8"/>WHEN PhoneNumber = '000-000-0000' THEN 'Geçersiz Numara'</text:span></text:p>
      <text:p text:style-name="Preformatted_20_Text"><text:span text:style-name="Source_20_Text"><text:s text:c="8"/>ELSE </text:span></text:p>
      <text:p text:style-name="Preformatted_20_Text"><text:span text:style-name="Source_20_Text"><text:s text:c="12"/>'(' + SUBSTRING(REPLACE(REPLACE(REPLACE(PhoneNumber, ' ', ''), '-', ''), ')', ''), 1, 3) + ') ' +</text:span></text:p>
      <text:p text:style-name="Preformatted_20_Text"><text:span text:style-name="Source_20_Text"><text:s text:c="12"/>SUBSTRING(REPLACE(REPLACE(REPLACE(PhoneNumber, ' ', ''), '-', ''), ')', ''), 4, 3) + '-' +</text:span></text:p>
      <text:p text:style-name="Preformatted_20_Text"><text:span text:style-name="Source_20_Text"><text:s text:c="12"/>SUBSTRING(REPLACE(REPLACE(REPLACE(PhoneNumber, ' ', ''), '-', ''), ')', ''), 7, 4)</text:span></text:p>
      <text:p text:style-name="Preformatted_20_Text"><text:span text:style-name="Source_20_Text"><text:s text:c="4"/>END,</text:span></text:p>
      <text:p text:style-name="Preformatted_20_Text"><text:span text:style-name="Source_20_Text"><text:s text:c="4"/>UPPER(TRIM(DeliveryAddress)),</text:span></text:p>
      <text:p text:style-name="Preformatted_20_Text"><text:span text:style-name="Source_20_Text"><text:s text:c="4"/>CONVERT(DATE, RegistrationDate, 105)</text:span></text:p>
      <text:p text:style-name="Preformatted_20_Text"><text:span text:style-name="Source_20_Text">FROM WideWorldImporters.dbo.Ham_Musteri_Verisi;</text:span></text:p>
      <text:p text:style-name="P11"><text:span text:style-name="Source_20_Text">GO</text:span></text:p>
      <text:h text:style-name="Heading_20_3" text:outline-level="3" text:is-list-header="true"><text:span text:style-name="T13">5</text:span>.2. Dinamik Veri Kalitesi ve Sistem Sağlığı Raporlama Sorguları </text:h>
      <text:p text:style-name="Text_20_body">Büyük veri yapılarında veriyi sadece yüklemek yeterli değildir; kurulan boru hattının (pipeline) ne <text:soft-page-break/>kadar veriyi temizlediğini ve sistemdeki verinin ne kadarının güvenilir olduğunu üst yönetime raporlamak gerekir. Bu amaçla, alt sistemlerden dönen temizlik istatistiklerini hesaplayan ve dinamik bir <text:span text:style-name="T1">Veri Kalite Başarı Skoru (%)</text:span> üreten aşağıdaki kurumsal raporlama betiği kurgulanmıştır: </text:p>
      <text:p text:style-name="P12">S<draw:frame draw:style-name="fr1" draw:name="Image3" text:anchor-type="char" svg:x="0.31cm" svg:y="0.159cm" svg:width="16.491cm" svg:height="11.492cm" draw:z-index="3"><draw:image xlink:href="Pictures/1000000100000549000003AFAF9B718937A82F58.png" xlink:type="simple" xlink:show="embed" xlink:actuate="onLoad" draw:mime-type="image/png"/></draw:frame>QL</text:p>
      <text:p text:style-name="Preformatted_20_Text"><text:span text:style-name="Source_20_Text">-- 5. ADIM: VERİ KALİTESİ VE ETL ÖZET RAPORU SORGUSU</text:span></text:p>
      <text:p text:style-name="Preformatted_20_Text"><text:span text:style-name="Source_20_Text">USE WideWorldImporters;</text:span></text:p>
      <text:p text:style-name="Preformatted_20_Text"><text:span text:style-name="Source_20_Text">GO</text:span></text:p>
      <text:p text:style-name="Preformatted_20_Text"/>
      <text:p text:style-name="Preformatted_20_Text"><text:span text:style-name="Source_20_Text">SELECT </text:span></text:p>
      <text:p text:style-name="Preformatted_20_Text"><text:span text:style-name="Source_20_Text"><text:s text:c="4"/>(SELECT COUNT(*) FROM dbo.Ham_Musteri_Verisi) AS [Toplam İşlenen Satır Sayısı],</text:span></text:p>
      <text:p text:style-name="Preformatted_20_Text"><text:span text:style-name="Source_20_Text"><text:s text:c="4"/>(SELECT COUNT(*) FROM dbo.Dim_Musteri_Temiz WHERE ContactPerson = 'Bilinmiyor') AS [Düzeltilen Eksik Veri (NULL) Sayısı],</text:span></text:p>
      <text:p text:style-name="Preformatted_20_Text"><text:span text:style-name="Source_20_Text"><text:s text:c="4"/>(SELECT COUNT(*) FROM dbo.Dim_Musteri_Temiz WHERE PhoneNumber = 'Geçersiz Numara') AS [Yakalanan Sahte Telefon Sayısı],</text:span></text:p>
      <text:p text:style-name="Preformatted_20_Text"><text:span text:style-name="Source_20_Text"><text:s text:c="4"/></text:span></text:p>
      <text:p text:style-name="Preformatted_20_Text"><text:span text:style-name="Source_20_Text"><text:s text:c="4"/>-- Veri Başarı Oranı Hesaplama</text:span></text:p>
      <text:p text:style-name="Preformatted_20_Text"><text:span text:style-name="Source_20_Text"><text:s text:c="4"/>CAST(</text:span></text:p>
      <text:p text:style-name="Preformatted_20_Text"><text:span text:style-name="Source_20_Text"><text:s text:c="8"/>(1.0 - (CAST((SELECT COUNT(*) FROM dbo.Dim_Musteri_Temiz WHERE PhoneNumber = 'Geçersiz Numara' OR ContactPerson = 'Bilinmiyor') AS FLOAT) / </text:span></text:p>
      <text:p text:style-name="Preformatted_20_Text"><text:span text:style-name="Source_20_Text"><text:s text:c="8"/>CAST((SELECT COUNT(*) FROM dbo.Ham_Musteri_Verisi) AS FLOAT))) * 100 </text:span></text:p>
      <text:p text:style-name="Preformatted_20_Text"><text:span text:style-name="Source_20_Text"><text:s text:c="4"/>AS DECIMAL(5,2)) AS [Veri Kalite Başarı Skoru (%)]</text:span></text:p>
      <text:p text:style-name="P11"><text:span text:style-name="Source_20_Text">GO</text:span></text:p>
      <text:p text:style-name="Text_20_body">Çalıştırılan rapor sonucunda, 1000 satırlık ham verinin sisteme sıfır veri kaybıyla entegre edildiği, anomali içeren satırların dinamik olarak ayıklandığı ve veri kalite skorunun şeffaf bir şekilde dökümlendiği doğrulanmıştır. </text:p>
      <text:h text:style-name="P1" text:outline-level="2"><text:soft-page-break/><text:span text:style-name="T13">6</text:span>. SONUÇ</text:h>
      <text:p text:style-name="Text_20_body"><text:span text:style-name="T1">Proje </text:span><text:span text:style-name="T2">5</text:span> kapsamında, elde edilen çıktılar, ham ve kontrolsüz operasyonel verilerin mühendislik süzgecinden geçirilmeden analitik sistemlerde kullanılmasının sakıncalarını net olarak ortaya koymuştur. Yazılan gelişmiş T-SQL Transform fonksiyonları sayesinde; eksik veriler (NULL) sisteme kazandırılmış , tutarsız formatlar standartlaştırılmış , harici heterojen kaynak uyuşmazlıkları ilişkisel join katmanında çözülmüş ve veritabanı bütünlüğü (Primary Key) tam yükleme stratejisiyle korunmuştur. Süreç sonunda üretilen dinamik Veri Kalite Raporları, karar destek mekanizmalarına beslenecek verilerin %100 kararlı ve güvenilir olduğunu bilimsel yaklaşımla tescillemişti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08T15:13:32.791000000</dc:date>
    <meta:editing-duration>PT3H6M44S</meta:editing-duration>
    <meta:editing-cycles>10</meta:editing-cycles>
    <meta:generator>LibreOffice/7.4.1.2$Windows_X86_64 LibreOffice_project/3c58a8f3a960df8bc8fd77b461821e42c061c5f0</meta:generator>
    <meta:document-statistic meta:table-count="0" meta:image-count="4" meta:object-count="0" meta:page-count="10" meta:paragraph-count="181" meta:word-count="1862" meta:character-count="16179" meta:non-whitespace-character-count="14117"/>
  </office:meta>
</office:document-meta>
</file>